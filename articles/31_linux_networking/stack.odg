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7.5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729fcf" draw:textarea-vertical-align="middle" draw:auto-grow-height="false" fo:min-height="0.749cm" fo:min-width="6.75cm" loext:decorative="false"/>
      <style:paragraph-properties style:writing-mode="lr-tb"/>
    </style:style>
    <style:style style:name="gr11" style:family="graphic" style:parent-style-name="standard">
      <style:graphic-properties svg:stroke-color="#000000" draw:textarea-vertical-align="middle" draw:auto-grow-height="false" fo:min-height="2.75cm" fo:min-width="4.7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standard">
      <style:graphic-properties draw:textarea-vertical-align="middle" draw:auto-grow-height="false" fo:min-height="0.749cm" fo:min-width="2.5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bbe33d" draw:textarea-vertical-align="middle" draw:auto-grow-height="false" fo:min-height="0.75cm" fo:min-width="2cm" loext:decorative="false"/>
      <style:paragraph-properties style:writing-mode="lr-tb"/>
    </style:style>
    <style:style style:name="gr1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standard">
      <style:graphic-properties draw:fill="solid" draw:fill-color="#729fcf" draw:textarea-vertical-align="middle" draw:auto-grow-height="false" fo:min-height="0.749cm" fo:min-width="3.25cm" loext:decorative="false"/>
      <style:paragraph-properties style:writing-mode="lr-tb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standard">
      <style:graphic-properties draw:textarea-vertical-align="middle" draw:auto-grow-height="false" fo:min-height="0.749cm" fo:min-width="3.75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9" style:family="graphic" style:parent-style-name="standard">
      <style:graphic-properties svg:stroke-color="#000000" draw:fill="solid" draw:fill-color="#ff972f" draw:textarea-vertical-align="middle" draw:auto-grow-height="false" fo:min-height="0.749cm" fo:min-width="3.25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standard">
      <style:graphic-properties svg:stroke-color="#000000" draw:fill="solid" draw:fill-color="#ff972f" draw:textarea-vertical-align="middle" draw:auto-grow-height="false" fo:min-height="0.749cm" fo:min-width="2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bbe33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972f"/>
      <style:paragraph-properties fo:text-align="center"/>
    </style:style>
    <style:style style:name="T1" style:family="text">
      <style:text-properties fo:background-color="#bbe33d"/>
    </style:style>
    <style:style style:name="T2" style:family="text">
      <style:text-properties fo:background-color="#729fcf"/>
    </style:style>
    <style:style style:name="T3" style:family="text">
      <style:text-properties fo:background-color="#ffd428"/>
    </style:style>
    <style:style style:name="T4" style:family="text">
      <style:text-properties fo:background-color="#ff972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49.75cm" svg:y="13cm">
          <draw:text-box>
            <text:p text:style-name="P1">Kernel space</text:p>
          </draw:text-box>
        </draw:frame>
        <draw:frame draw:style-name="gr2" draw:text-style-name="P2" draw:layer="layout" svg:width="5cm" svg:height="1cm" svg:x="50cm" svg:y="12cm">
          <draw:text-box>
            <text:p text:style-name="P1">User space</text:p>
          </draw:text-box>
        </draw:frame>
        <draw:custom-shape draw:style-name="gr3" draw:text-style-name="P3" xml:id="id5" draw:id="id5" draw:layer="layout" svg:width="4.5cm" svg:height="0.999cm" svg:x="54.25cm" svg:y="9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5cm" svg:height="1cm" svg:x="12.25cm" svg:y="7.25cm">
          <text:p text:style-name="P3">nft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5.5cm" svg:height="0.999cm" svg:x="34.01cm" svg:y="9.001cm">
          <text:p text:style-name="P3">NetworkManag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9cm" svg:y1="13cm" svg:x2="29cm" svg:y2="2cm">
          <text:p/>
        </draw:line>
        <draw:frame draw:style-name="gr7" draw:text-style-name="P2" draw:layer="layout" svg:width="3cm" svg:height="1cm" svg:x="26cm" svg:y="2cm">
          <draw:text-box>
            <text:p text:style-name="P1">Filtering</text:p>
          </draw:text-box>
        </draw:frame>
        <draw:frame draw:style-name="gr8" draw:text-style-name="P5" draw:layer="layout" svg:width="4.279cm" svg:height="0.962cm" svg:x="29cm" svg:y="2cm">
          <draw:text-box>
            <text:p>Configuration</text:p>
          </draw:text-box>
        </draw:frame>
        <draw:custom-shape draw:style-name="gr5" draw:text-style-name="P4" xml:id="id8" draw:id="id8" draw:layer="layout" svg:width="5.5cm" svg:height="0.999cm" svg:x="40.01cm" svg:y="9.001cm">
          <text:p text:style-name="P3">systemd-netword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8cm" svg:height="2.5cm" svg:x="25cm" svg:y="12.25cm">
          <text:p text:style-name="P3">Netlink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cm" svg:y1="13cm" svg:x2="55cm" svg:y2="13cm">
          <text:p/>
        </draw:line>
        <draw:custom-shape draw:style-name="gr10" draw:text-style-name="P4" xml:id="id1" draw:id="id1" draw:layer="layout" svg:width="7.25cm" svg:height="0.999cm" svg:x="19.5cm" svg:y="6.751cm">
          <text:p text:style-name="P3">systemd-firewalld</text:p>
          <draw:enhanced-geometry svg:viewBox="0 0 21600 21600" draw:type="rectangle" draw:enhanced-path="M 0 0 L 21600 0 21600 21600 0 21600 0 0 Z N"/>
        </draw:custom-shape>
        <draw:custom-shape draw:style-name="gr11" draw:text-style-name="P3" xml:id="id3" draw:id="id3" draw:layer="layout" svg:width="5.25cm" svg:height="3cm" svg:x="8.75cm" svg:y="3.75cm">
          <text:p text:style-name="P3">UFW</text:p>
          <text:p text:style-name="P3">(run by user and as systemd unit at boot)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23.125cm" svg:y1="7.75cm" svg:x2="18.75cm" svg:y2="7.999cm" draw:start-shape="id1" draw:start-glue-point="2" draw:end-shape="id2" draw:end-glue-point="1" svg:d="M23125 7750v249h-4375" svg:viewBox="0 0 4376 250">
          <text:p/>
        </draw:connector>
        <draw:connector draw:style-name="gr13" draw:text-style-name="P7" draw:layer="layout" svg:x1="11.375cm" svg:y1="6.75cm" svg:x2="12.25cm" svg:y2="7.75cm" draw:start-shape="id3" draw:start-glue-point="2" draw:end-shape="id4" draw:end-glue-point="3" svg:d="M11375 6750v1000h875" svg:viewBox="0 0 876 1001">
          <text:p/>
        </draw:connector>
        <draw:connector draw:style-name="gr14" draw:text-style-name="P7" draw:layer="layout" svg:x1="56.5cm" svg:y1="9.999cm" svg:x2="29cm" svg:y2="12.25cm" draw:start-shape="id5" draw:start-glue-point="2" draw:end-shape="id6" draw:end-glue-point="0" svg:d="M56500 9999v1125h-27500v1126" svg:viewBox="0 0 27501 2252">
          <text:p/>
        </draw:connector>
        <draw:connector draw:style-name="gr15" draw:text-style-name="P7" draw:layer="layout" svg:x1="36.76cm" svg:y1="10cm" svg:x2="29cm" svg:y2="12.25cm" draw:start-shape="id7" draw:start-glue-point="2" draw:end-shape="id6" draw:end-glue-point="0" svg:d="M36760 10000v1125h-7760v1125" svg:viewBox="0 0 7761 2251">
          <text:p/>
        </draw:connector>
        <draw:connector draw:style-name="gr16" draw:text-style-name="P7" draw:layer="layout" svg:x1="42.76cm" svg:y1="10cm" svg:x2="29cm" svg:y2="12.25cm" draw:start-shape="id8" draw:start-glue-point="2" draw:end-shape="id6" draw:end-glue-point="0" svg:d="M42760 10000v1125h-13760v1125" svg:viewBox="0 0 13761 2251">
          <text:p/>
        </draw:connector>
        <draw:custom-shape draw:style-name="gr17" draw:text-style-name="P3" xml:id="id9" draw:id="id9" draw:layer="layout" svg:width="3cm" svg:height="0.999cm" svg:x="41.75cm" svg:y="4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8" draw:text-style-name="P6" xml:id="id11" draw:id="id11" draw:layer="layout" svg:width="2.5cm" svg:height="1cm" svg:x="35.75cm" svg:y="7.2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43.25cm" svg:y1="5.75cm" svg:x2="39cm" svg:y2="5.001cm" draw:start-shape="id9" draw:start-glue-point="2" draw:end-shape="id10" draw:end-glue-point="0" svg:d="M43250 5750v500h-2250v-1751h-2000v502" svg:viewBox="0 0 4251 1752">
          <text:p/>
        </draw:connector>
        <draw:connector draw:style-name="gr20" draw:text-style-name="P7" draw:layer="layout" svg:x1="37cm" svg:y1="8.25cm" svg:x2="36.76cm" svg:y2="9.001cm" draw:start-shape="id11" draw:start-glue-point="2" draw:end-shape="id7" draw:end-glue-point="0" svg:d="M37000 8250v375h-240v376" svg:viewBox="0 0 241 752">
          <text:p/>
        </draw:connector>
        <draw:custom-shape draw:style-name="gr21" draw:text-style-name="P4" xml:id="id12" draw:id="id12" draw:layer="layout" svg:width="3.75cm" svg:height="0.999cm" svg:x="46.75cm" svg:y="9cm">
          <text:p text:style-name="P3">FRRouting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48.625cm" svg:y1="9.999cm" svg:x2="29cm" svg:y2="12.25cm" draw:start-shape="id12" draw:start-glue-point="2" draw:end-shape="id6" draw:end-glue-point="0" svg:d="M48625 9999v1125h-19625v1126" svg:viewBox="0 0 19626 2252">
          <text:p/>
        </draw:connector>
        <draw:custom-shape draw:style-name="gr23" draw:text-style-name="P3" xml:id="id13" draw:id="id13" draw:layer="layout" svg:width="2.25cm" svg:height="1cm" svg:x="33cm" svg:y="4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4" draw:text-style-name="P7" draw:layer="layout" svg:x1="34.125cm" svg:y1="5cm" svg:x2="39cm" svg:y2="5.001cm" draw:start-shape="id13" draw:start-glue-point="2" draw:end-shape="id10" draw:end-glue-point="0" svg:d="M34125 5000v501h2375v-1002h2500v502" svg:viewBox="0 0 4876 1003">
          <text:p/>
        </draw:connector>
        <draw:custom-shape draw:style-name="gr25" draw:text-style-name="P3" xml:id="id14" draw:id="id14" draw:layer="layout" svg:width="4.25cm" svg:height="0.999cm" svg:x="15.25cm" svg:y="3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17.375cm" svg:y1="3.999cm" svg:x2="24.25cm" svg:y2="5cm" draw:start-shape="id14" draw:start-glue-point="2" draw:end-shape="id15" draw:end-glue-point="0" svg:d="M17375 3999v500h6875v501" svg:viewBox="0 0 6876 1002">
          <text:p/>
        </draw:connector>
        <draw:frame draw:style-name="gr8" draw:text-style-name="P5" draw:layer="layout" svg:width="8.939cm" svg:height="3.095cm" svg:x="0.75cm" svg:y="0.655cm">
          <draw:text-box>
            <text:p><text:span text:style-name="T1">API</text:span></text:p>
            <text:p><text:span text:style-name="T2">Continuously running daemon</text:span></text:p>
            <text:p><text:span text:style-name="T3">Non-daemon process</text:span></text:p>
            <text:p><text:span text:style-name="T4">Library</text:span></text:p>
          </draw:text-box>
        </draw:frame>
        <draw:frame draw:style-name="gr8" draw:text-style-name="P5" draw:layer="layout" svg:width="3.818cm" svg:height="0.962cm" svg:x="23.5cm" svg:y="16.788cm">
          <draw:text-box>
            <text:p>Firewall VM</text:p>
          </draw:text-box>
        </draw:frame>
        <draw:custom-shape draw:style-name="gr18" draw:text-style-name="P6" xml:id="id15" draw:id="id15" draw:layer="layout" svg:width="2.5cm" svg:height="1cm" svg:x="23cm" svg:y="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7" draw:text-style-name="P7" draw:layer="layout" svg:x1="24.25cm" svg:y1="6cm" svg:x2="23.125cm" svg:y2="6.751cm" draw:start-shape="id15" draw:start-glue-point="2" draw:end-shape="id1" draw:end-glue-point="0" svg:d="M24250 6000v375h-1125v376" svg:viewBox="0 0 1126 752">
          <text:p/>
        </draw:connector>
        <draw:connector draw:style-name="gr28" draw:text-style-name="P7" draw:layer="layout" svg:x1="26.75cm" svg:y1="7.25cm" svg:x2="34.01cm" svg:y2="9.5cm" draw:start-shape="id1" draw:start-glue-point="1" draw:end-shape="id7" draw:end-glue-point="3" svg:d="M26750 7250h3630v2250h3630" svg:viewBox="0 0 7261 2251">
          <text:p/>
        </draw:connector>
        <draw:custom-shape draw:style-name="gr29" draw:text-style-name="P8" xml:id="id2" draw:id="id2" draw:layer="layout" svg:width="3.75cm" svg:height="0.999cm" svg:x="15cm" svg:y="7.5cm"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svg:x1="13.75cm" svg:y1="7.75cm" svg:x2="15cm" svg:y2="7.999cm" draw:start-shape="id4" draw:start-glue-point="1" draw:end-shape="id2" draw:end-glue-point="3" svg:d="M13750 7750h625v249h625" svg:viewBox="0 0 1251 250">
          <text:p/>
        </draw:connector>
        <draw:connector draw:style-name="gr31" draw:text-style-name="P7" draw:layer="layout" svg:x1="15.25cm" svg:y1="10.25cm" svg:x2="15.25cm" svg:y2="10.751cm" draw:start-shape="id16" draw:start-glue-point="2" draw:end-shape="id17" draw:end-glue-point="0" svg:d="M15250 10250v501" svg:viewBox="0 0 1 502">
          <text:p/>
        </draw:connector>
        <draw:custom-shape draw:style-name="gr32" draw:text-style-name="P8" xml:id="id16" draw:id="id16" draw:layer="layout" svg:width="2.5cm" svg:height="0.999cm" svg:x="14cm" svg:y="9.251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3" draw:text-style-name="P7" draw:layer="layout" svg:x1="16.875cm" svg:y1="8.499cm" svg:x2="15.25cm" svg:y2="9.251cm" draw:start-shape="id2" draw:start-glue-point="2" draw:end-shape="id16" draw:end-glue-point="0" svg:d="M16875 8499v375h-1625v377" svg:viewBox="0 0 1626 753">
          <text:p/>
        </draw:connector>
        <draw:custom-shape draw:style-name="gr32" draw:text-style-name="P8" xml:id="id17" draw:id="id17" draw:layer="layout" svg:width="2.5cm" svg:height="0.999cm" svg:x="14cm" svg:y="10.751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15.25cm" svg:y1="11.75cm" svg:x2="29cm" svg:y2="12.25cm" draw:start-shape="id17" draw:start-glue-point="2" draw:end-shape="id6" draw:end-glue-point="0" svg:d="M15250 11750v500h5500v-501h8250v501" svg:viewBox="0 0 13751 502">
          <text:p/>
        </draw:connector>
        <draw:custom-shape draw:style-name="gr32" draw:text-style-name="P8" xml:id="id10" draw:id="id10" draw:layer="layout" svg:width="2.5cm" svg:height="0.999cm" svg:x="37.75cm" svg:y="5.001cm"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5" draw:text-style-name="P7" draw:layer="layout" svg:x1="39cm" svg:y1="6cm" svg:x2="37cm" svg:y2="7.25cm" draw:start-shape="id10" draw:start-glue-point="2" draw:end-shape="id11" draw:end-glue-point="0" svg:d="M39000 6000v625h-2000v625" svg:viewBox="0 0 2001 1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4T15:40:36.746964896</dc:date>
    <meta:editing-duration>PT2H8M25S</meta:editing-duration>
    <meta:editing-cycles>26</meta:editing-cycles>
    <meta:generator>LibreOffice/25.2.3.2$Linux_X86_64 LibreOffice_project/520$Build-2</meta:generator>
    <meta:document-statistic meta:object-count="42"/>
  </office:meta>
</office:document-meta>
</file>