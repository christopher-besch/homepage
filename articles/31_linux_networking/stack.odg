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9.5cm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standard">
      <style:graphic-properties svg:stroke-color="#000000" draw:fill="solid" draw:fill-color="#ff972f" draw:textarea-vertical-align="middle" draw:auto-grow-height="false" fo:min-height="0.749cm" fo:min-width="3.5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ff972f" draw:textarea-vertical-align="middle" draw:auto-grow-height="false" fo:min-height="0.749cm" fo:min-width="2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textarea-vertical-align="middle" draw:auto-grow-height="false" fo:min-height="1.25cm" fo:min-width="3.5cm" loext:decorative="false"/>
      <style:paragraph-properties style:writing-mode="lr-tb"/>
    </style:style>
    <style:style style:name="gr3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9" style:family="graphic" style:parent-style-name="standard">
      <style:graphic-properties svg:stroke-color="#000000" draw:fill="solid" draw:fill-color="#ff972f" draw:textarea-vertical-align="middle" draw:auto-grow-height="false" fo:min-height="0.749cm" fo:min-width="2.5cm" loext:decorative="false"/>
      <style:paragraph-properties style:writing-mode="lr-tb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bbe33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3" style:family="paragraph">
      <loext:graphic-properties draw:fill="solid" draw:fill-color="#ff972f"/>
      <style:paragraph-properties fo:text-align="center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3" xml:id="id19" draw:id="id19" draw:layer="layout" svg:width="4.5cm" svg:height="0.999cm" svg:x="5.75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5.5cm" svg:height="0.999cm" svg:x="10.01cm" svg:y="10.751cm"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cm" svg:height="1.673cm" svg:x="12.25cm" svg:y="1.75cm">
          <draw:text-box>
            <text:p text:style-name="P5">Configuration</text:p>
          </draw:text-box>
        </draw:frame>
        <draw:frame draw:style-name="gr7" draw:text-style-name="P7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9" xml:id="id8" draw:id="id8" draw:layer="layout" svg:width="3.75cm" svg:height="1.5cm" svg:x="1cm" svg:y="10.25cm">
          <text:p text:style-name="P8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0" xml:id="id6" draw:id="id6" draw:layer="layout" svg:width="10cm" svg:height="2.5cm" svg:x="11.75cm" svg:y="14cm">
          <draw:glue-point draw:id="5" svg:x="-3cm" svg:y="-5cm"/>
          <draw:glue-point draw:id="7" svg:x="-4cm" svg:y="-5cm"/>
          <draw:glue-point draw:id="8" svg:x="2.5cm" svg:y="-5cm" draw:escape-direction="up"/>
          <draw:glue-point draw:id="9" svg:x="-2cm" svg:y="-5cm"/>
          <draw:glue-point draw:id="10" svg:x="-1cm" svg:y="-5cm"/>
          <text:p text:style-name="P3">Netlink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4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1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1" draw:layer="layout" draw:line-skew="1.876cm" svg:x1="9cm" svg:y1="8.249cm" svg:x2="14.75cm" svg:y2="14cm" draw:start-shape="id5" draw:start-glue-point="2" draw:end-shape="id6" draw:end-glue-point="9" svg:d="M9000 8249v4751h5750v1000" svg:viewBox="0 0 5751 5752">
          <text:p/>
        </draw:connector>
        <draw:connector draw:style-name="gr16" draw:text-style-name="P11" draw:layer="layout" draw:line-skew="-0.125cm" svg:x1="12.76cm" svg:y1="11.75cm" svg:x2="15.75cm" svg:y2="14cm" draw:start-shape="id7" draw:start-glue-point="2" draw:end-shape="id6" draw:end-glue-point="10" svg:d="M12760 11750v1000h2990v1250" svg:viewBox="0 0 2991 2251">
          <text:p/>
        </draw:connector>
        <draw:connector draw:style-name="gr17" draw:text-style-name="P11" draw:layer="layout" draw:line-skew="0.625cm" svg:x1="2.875cm" svg:y1="11.75cm" svg:x2="12.75cm" svg:y2="14cm" draw:start-shape="id8" draw:start-glue-point="2" draw:end-shape="id6" draw:end-glue-point="7" svg:d="M2875 11750v1750h9875v500" svg:viewBox="0 0 9876 2251">
          <text:p/>
        </draw:connector>
        <draw:custom-shape draw:style-name="gr18" draw:text-style-name="P3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1" draw:id="id11" draw:layer="layout" svg:width="2.5cm" svg:height="1cm" svg:x="11.5cm" svg:y="9.2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15cm" svg:y1="4.75cm" svg:x2="12.75cm" svg:y2="7.75cm" draw:start-shape="id9" draw:start-glue-point="2" draw:end-shape="id10" draw:end-glue-point="0" svg:d="M15000 4750v1499h-2250v1501" svg:viewBox="0 0 2251 3001">
          <text:p/>
        </draw:connector>
        <draw:connector draw:style-name="gr21" draw:text-style-name="P11" draw:layer="layout" svg:x1="12.75cm" svg:y1="10.25cm" svg:x2="12.76cm" svg:y2="10.751cm" draw:start-shape="id11" draw:start-glue-point="2" draw:end-shape="id7" draw:end-glue-point="0" svg:d="M12750 10250v250h10v251" svg:viewBox="0 0 11 502">
          <text:p/>
        </draw:connector>
        <draw:custom-shape draw:style-name="gr22" draw:text-style-name="P4" xml:id="id12" draw:id="id12" draw:layer="layout" svg:width="5.75cm" svg:height="0.999cm" svg:x="2.25cm" svg:y="8.75cm"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line-skew="1.376cm" svg:x1="5.125cm" svg:y1="9.749cm" svg:x2="13.75cm" svg:y2="14cm" draw:start-shape="id12" draw:start-glue-point="2" draw:end-shape="id6" draw:end-glue-point="5" svg:d="M5125 9749v3501h8625v750" svg:viewBox="0 0 8626 4252">
          <text:p/>
        </draw:connector>
        <draw:custom-shape draw:style-name="gr24" draw:text-style-name="P3" xml:id="id13" draw:id="id13" draw:layer="layout" svg:width="2.25cm" svg:height="1cm" svg:x="10.75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11.875cm" svg:y1="4.75cm" svg:x2="12.75cm" svg:y2="7.75cm" draw:start-shape="id13" draw:start-glue-point="2" draw:end-shape="id10" draw:end-glue-point="0" svg:d="M11875 4750v1500h875v1500" svg:viewBox="0 0 876 3001">
          <text:p/>
        </draw:connector>
        <draw:custom-shape draw:style-name="gr26" draw:text-style-name="P3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1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7" draw:text-style-name="P7" draw:layer="layout" svg:width="8.939cm" svg:height="3.095cm" svg:x="0.061cm" svg:y="1.25cm">
          <draw:text-box>
            <text:p><text:span text:style-name="T1">Continuously running daemon</text:span></text:p>
            <text:p><text:span text:style-name="T2">Non-daemon process</text:span></text:p>
            <text:p><text:span text:style-name="T3">Library</text:span></text:p>
            <text:p text:style-name="P12"><text:span text:style-name="T4">API</text:span></text:p>
          </draw:text-box>
        </draw:frame>
        <draw:custom-shape draw:style-name="gr19" draw:text-style-name="P10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8" draw:text-style-name="P11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29" draw:text-style-name="P11" draw:layer="layout" svg:x1="17.5cm" svg:y1="7.251cm" svg:x2="15.51cm" svg:y2="11.25cm" draw:start-shape="id1" draw:start-glue-point="3" draw:end-shape="id7" draw:end-glue-point="1" svg:d="M17500 7251h-995v3999h-995" svg:viewBox="0 0 1991 4000">
          <text:p/>
        </draw:connector>
        <draw:custom-shape draw:style-name="gr30" draw:text-style-name="P13" xml:id="id2" draw:id="id2" draw:layer="layout" svg:width="4cm" svg:height="0.999cm" svg:x="19.75cm" svg:y="8.75cm"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svg:x1="22.25cm" svg:y1="4.75cm" svg:x2="21.75cm" svg:y2="8.75cm" draw:start-shape="id16" draw:start-glue-point="2" draw:end-shape="id2" draw:end-glue-point="0" svg:d="M22250 4750v2000h-500v2000" svg:viewBox="0 0 501 4001">
          <text:p/>
        </draw:connector>
        <draw:connector draw:style-name="gr32" draw:text-style-name="P11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3" draw:text-style-name="P13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4" draw:text-style-name="P11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3" draw:text-style-name="P13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1.75cm" svg:y1="12.749cm" svg:x2="19.25cm" svg:y2="14cm" draw:start-shape="id18" draw:start-glue-point="2" draw:end-shape="id6" draw:end-glue-point="8" svg:d="M21750 12749v625h-2500v626" svg:viewBox="0 0 2501 1252">
          <text:p/>
        </draw:connector>
        <draw:custom-shape draw:style-name="gr33" draw:text-style-name="P13" xml:id="id10" draw:id="id10" draw:layer="layout" svg:width="2.5cm" svg:height="0.999cm" svg:x="11.5cm" svg:y="7.75cm"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6" draw:text-style-name="P11" draw:layer="layout" svg:x1="12.75cm" svg:y1="8.749cm" svg:x2="12.75cm" svg:y2="9.25cm" draw:start-shape="id10" draw:start-glue-point="2" draw:end-shape="id11" draw:end-glue-point="0" svg:d="M12750 8749v501" svg:viewBox="0 0 1 502">
          <text:p/>
        </draw:connector>
        <draw:frame draw:style-name="gr7" draw:text-style-name="P7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7" draw:text-style-name="P3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39" draw:text-style-name="P13" xml:id="id5" draw:id="id5" draw:layer="layout" svg:width="3cm" svg:height="0.999cm" svg:x="7.5cm" svg:y="7.25cm"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0" draw:text-style-name="P11" draw:layer="layout" svg:x1="8cm" svg:y1="4.749cm" svg:x2="9cm" svg:y2="7.25cm" draw:start-shape="id19" draw:start-glue-point="2" draw:end-shape="id5" draw:end-glue-point="0" svg:d="M8000 4749v1250h1000v1251" svg:viewBox="0 0 1001 250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4T17:33:34.126199413</dc:date>
    <meta:editing-duration>PT4H1M13S</meta:editing-duration>
    <meta:editing-cycles>49</meta:editing-cycles>
    <meta:generator>LibreOffice/25.2.3.2$Linux_X86_64 LibreOffice_project/520$Build-2</meta:generator>
    <meta:document-statistic meta:object-count="46"/>
  </office:meta>
</office:document-meta>
</file>