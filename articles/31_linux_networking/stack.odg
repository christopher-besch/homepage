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75cm" fo:min-width="0cm" loext:decorative="false"/>
      <style:paragraph-properties style:writing-mode="lr-tb"/>
    </style:style>
    <style:style style:name="gr3" style:family="graphic" style:parent-style-name="standard">
      <style:graphic-properties svg:stroke-color="#000000" draw:textarea-vertical-align="middle" draw:auto-grow-height="false" fo:min-height="0.749cm" fo:min-width="4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textarea-vertical-align="middle" draw:auto-grow-height="false" fo:min-height="0.75cm" fo:min-width="1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729fcf" draw:textarea-vertical-align="middle" draw:auto-grow-height="false" fo:min-height="0.749cm" fo:min-width="5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right" draw:auto-grow-height="true" draw:auto-grow-width="false" fo:min-height="1.423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cm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000000" draw:fill="solid" draw:fill-color="#729fcf" draw:textarea-vertical-align="middle" draw:auto-grow-height="false" fo:min-height="1.25cm" fo:min-width="3.25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bbe33d" draw:textarea-vertical-align="middle" draw:auto-grow-height="false" fo:min-height="2.25cm" fo:min-width="11.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Long_20_Dash" svg:stroke-color="#000000" svg:stroke-linecap="butt" draw:textarea-vertical-align="middle" loext:decorative="false"/>
    </style:style>
    <style:style style:name="gr11" style:family="graphic" style:parent-style-name="standard">
      <style:graphic-properties svg:stroke-color="#000000" draw:fill="solid" draw:fill-color="#729fcf" draw:textarea-vertical-align="middle" draw:auto-grow-height="false" fo:min-height="0.749cm" fo:min-width="2.5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textarea-vertical-align="middle" draw:auto-grow-height="false" fo:min-height="2.25cm" fo:min-width="4.75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8" style:family="graphic" style:parent-style-name="standard">
      <style:graphic-properties draw:textarea-vertical-align="middle" draw:auto-grow-height="false" fo:min-height="0.749cm" fo:min-width="2.5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bbe33d" draw:textarea-vertical-align="middle" draw:auto-grow-height="false" fo:min-height="0.75cm" fo:min-width="2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2" style:family="graphic" style:parent-style-name="standard">
      <style:graphic-properties draw:fill="solid" draw:fill-color="#729fcf" draw:textarea-vertical-align="middle" draw:auto-grow-height="false" fo:min-height="0.749cm" fo:min-width="5.25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6" style:family="graphic" style:parent-style-name="standard">
      <style:graphic-properties draw:textarea-vertical-align="middle" draw:auto-grow-height="false" fo:min-height="0.749cm" fo:min-width="3.5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439cm" loext:decorative="false"/>
      <style:paragraph-properties style:writing-mode="lr-tb"/>
    </style:style>
    <style:style style:name="gr29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31" style:family="graphic" style:parent-style-name="standard">
      <style:graphic-properties svg:stroke-color="#000000" draw:fill="solid" draw:fill-color="#ff972f" draw:textarea-vertical-align="middle" draw:auto-grow-height="false" fo:min-height="0.749cm" fo:min-width="3.5cm" style:writing-mode="lr-tb" loext:decorative="false"/>
      <style:paragraph-properties style:writing-mode="lr-tb"/>
    </style:style>
    <style:style style:name="gr32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4" style:family="graphic" style:parent-style-name="standard">
      <style:graphic-properties svg:stroke-color="#000000" draw:fill="solid" draw:fill-color="#ff972f" draw:textarea-vertical-align="middle" draw:auto-grow-height="false" fo:min-height="0.749cm" fo:min-width="2cm" style:writing-mode="lr-tb" loext:decorative="false"/>
      <style:paragraph-properties style:writing-mode="lr-tb"/>
    </style:style>
    <style:style style:name="gr35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8cm" loext:decorative="false"/>
      <style:paragraph-properties style:writing-mode="lr-tb"/>
    </style:style>
    <style:style style:name="gr39" style:family="graphic" style:parent-style-name="standard">
      <style:graphic-properties svg:stroke-color="#000000" draw:textarea-vertical-align="middle" draw:auto-grow-height="false" fo:min-height="1.25cm" fo:min-width="3.5cm" style:writing-mode="lr-tb" loext:decorative="false"/>
      <style:paragraph-properties style:writing-mode="lr-tb"/>
    </style:style>
    <style:style style:name="gr40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41" style:family="graphic" style:parent-style-name="standard">
      <style:graphic-properties svg:stroke-color="#000000" draw:fill="solid" draw:fill-color="#ff972f" draw:textarea-vertical-align="middle" draw:auto-grow-height="false" fo:min-height="0.749cm" fo:min-width="2.5cm" style:writing-mode="lr-tb" loext:decorative="false"/>
      <style:paragraph-properties style:writing-mode="lr-tb"/>
    </style:style>
    <style:style style:name="gr42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43" style:family="graphic" style:parent-style-name="standard">
      <style:graphic-properties svg:stroke-color="#000000" draw:fill="solid" draw:fill-color="#729fcf" draw:textarea-vertical-align="middle" draw:auto-grow-height="false" fo:min-height="0.749cm" fo:min-width="1.5cm" style:writing-mode="lr-tb" loext:decorative="false"/>
      <style:paragraph-properties style:writing-mode="lr-tb"/>
    </style:style>
    <style:style style:name="gr4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6" style:family="graphic" style:parent-style-name="standard">
      <style:graphic-properties svg:stroke-color="#000000" draw:textarea-vertical-align="middle" draw:auto-grow-height="false" fo:min-height="0.749cm" fo:min-width="2.25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49" style:family="graphic" style:parent-style-name="standard">
      <style:graphic-properties draw:textarea-vertical-align="middle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4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729fcf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</style:style>
    <style:style style:name="P11" style:family="paragraph">
      <loext:graphic-properties draw:fill="solid" draw:fill-color="#bbe33d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line-height="150%"/>
    </style:style>
    <style:style style:name="P14" style:family="paragraph">
      <style:paragraph-properties fo:margin-left="0cm" fo:margin-right="0cm" fo:margin-top="0cm" fo:margin-bottom="0cm" fo:line-height="150%" fo:text-indent="0cm" loext:tab-stop-distance="0cm">
        <style:tab-stops/>
      </style:paragraph-properties>
    </style:style>
    <style:style style:name="P15" style:family="paragraph">
      <loext:graphic-properties draw:fill="none" draw:fill-color="#ffffff"/>
      <style:paragraph-properties fo:line-height="150%"/>
    </style:style>
    <style:style style:name="P16" style:family="paragraph">
      <loext:graphic-properties draw:fill="solid" draw:fill-color="#ff972f"/>
      <style:paragraph-properties fo:text-align="center" style:writing-mode="lr-tb"/>
    </style:style>
    <style:style style:name="T1" style:family="text">
      <style:text-properties fo:background-color="#729fcf"/>
    </style:style>
    <style:style style:name="T2" style:family="text">
      <style:text-properties fo:background-color="#ffd428"/>
    </style:style>
    <style:style style:name="T3" style:family="text">
      <style:text-properties fo:background-color="#ff972f"/>
    </style:style>
    <style:style style:name="T4" style:family="text">
      <style:text-properties fo:background-color="#bbe33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5cm" svg:height="1.25cm" svg:x="29.5cm" svg:y="14.75cm">
          <draw:text-box>
            <text:p text:style-name="P1">Kernel space</text:p>
          </draw:text-box>
        </draw:frame>
        <draw:frame draw:style-name="gr2" draw:text-style-name="P2" draw:layer="layout" svg:width="5cm" svg:height="1cm" svg:x="29.75cm" svg:y="13.75cm">
          <draw:text-box>
            <text:p text:style-name="P1">User space</text:p>
          </draw:text-box>
        </draw:frame>
        <draw:custom-shape draw:style-name="gr3" draw:text-style-name="P4" xml:id="id19" draw:id="id19" draw:layer="layout" svg:width="4.5cm" svg:height="0.999cm" svg:x="6cm" svg:y="3.75cm">
          <text:p text:style-name="P3">iproute2 tools</text:p>
          <draw:enhanced-geometry svg:viewBox="0 0 21600 21600" draw:type="rectangle" draw:enhanced-path="M 0 0 L 21600 0 21600 21600 0 21600 0 0 Z N"/>
        </draw:custom-shape>
        <draw:custom-shape draw:style-name="gr4" draw:text-style-name="P4" xml:id="id16" draw:id="id16" draw:layer="layout" svg:width="1.5cm" svg:height="1cm" svg:x="21.5cm" svg:y="3.75cm">
          <text:p text:style-name="P3">n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" draw:id="id7" draw:layer="layout" svg:width="5.5cm" svg:height="0.999cm" svg:x="10cm" svg:y="9.001cm">
          <draw:glue-point draw:id="4" svg:x="-4.109cm" svg:y="5.005cm"/>
          <text:p text:style-name="P3">NetworkManager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5cm" svg:height="1.673cm" svg:x="12.25cm" svg:y="1.75cm">
          <draw:text-box>
            <text:p text:style-name="P6">Configuration</text:p>
          </draw:text-box>
        </draw:frame>
        <draw:frame draw:style-name="gr7" draw:text-style-name="P8" draw:layer="layout" svg:width="2.76cm" svg:height="0.962cm" svg:x="16.75cm" svg:y="1.75cm">
          <draw:text-box>
            <text:p>Filtering</text:p>
          </draw:text-box>
        </draw:frame>
        <draw:custom-shape draw:style-name="gr8" draw:text-style-name="P10" xml:id="id8" draw:id="id8" draw:layer="layout" svg:width="3.75cm" svg:height="1.5cm" svg:x="1cm" svg:y="10.25cm">
          <text:p text:style-name="P9">FRRouting daemons</text:p>
          <draw:enhanced-geometry svg:viewBox="0 0 21600 21600" draw:type="rectangle" draw:enhanced-path="M 0 0 L 21600 0 21600 21600 0 21600 0 0 Z N"/>
        </draw:custom-shape>
        <draw:custom-shape draw:style-name="gr9" draw:text-style-name="P11" xml:id="id6" draw:id="id6" draw:layer="layout" svg:width="12cm" svg:height="2.5cm" svg:x="10.75cm" svg:y="14cm">
          <draw:glue-point draw:id="4" svg:x="-3.333cm" svg:y="-5cm"/>
          <draw:glue-point draw:id="5" svg:x="-4.166cm" svg:y="-5cm"/>
          <draw:glue-point draw:id="6" svg:x="2.5cm" svg:y="-5cm" draw:escape-direction="up"/>
          <draw:glue-point draw:id="7" svg:x="-2.5cm" svg:y="-5cm"/>
          <draw:glue-point draw:id="8" svg:x="-0.833cm" svg:y="-5cm" draw:escape-direction="up"/>
          <draw:glue-point draw:id="9" svg:x="-1.666cm" svg:y="-5cm"/>
          <draw:glue-point draw:id="10" svg:x="4.166cm" svg:y="-5cm"/>
          <text:p text:style-name="P3">Netlin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0.25cm" svg:y1="14.75cm" svg:x2="34.75cm" svg:y2="14.75cm">
          <text:p/>
        </draw:line>
        <draw:custom-shape draw:style-name="gr11" draw:text-style-name="P5" xml:id="id1" draw:id="id1" draw:layer="layout" svg:width="3cm" svg:height="0.999cm" svg:x="17.5cm" svg:y="6.752cm">
          <text:p text:style-name="P3">firewalld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layout" svg:width="5.25cm" svg:height="2.5cm" svg:x="28.5cm" svg:y="3.75cm">
          <text:p text:style-name="P3">UFW</text:p>
          <text:p text:style-name="P3">(run by user and at boot)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19cm" svg:y1="7.751cm" svg:x2="19.75cm" svg:y2="9.249cm" draw:start-shape="id1" draw:start-glue-point="2" draw:end-shape="id2" draw:end-glue-point="3" svg:d="M19000 7751v1498h750" svg:viewBox="0 0 751 1499">
          <text:p/>
        </draw:connector>
        <draw:connector draw:style-name="gr14" draw:text-style-name="P12" draw:layer="layout" svg:x1="28.5cm" svg:y1="5cm" svg:x2="27.5cm" svg:y2="4.5cm" draw:start-shape="id3" draw:start-glue-point="3" draw:end-shape="id4" draw:end-glue-point="1" svg:d="M28500 5000h-500v-500h-500" svg:viewBox="0 0 1001 501">
          <text:p/>
        </draw:connector>
        <draw:connector draw:style-name="gr15" draw:text-style-name="P12" draw:layer="layout" draw:line-skew="1.875cm" svg:x1="9cm" svg:y1="7.25cm" svg:x2="13.75cm" svg:y2="14cm" draw:start-shape="id5" draw:start-glue-point="2" draw:end-shape="id6" draw:end-glue-point="7" svg:d="M9000 7250v5250h4750v1500" svg:viewBox="0 0 4751 6751">
          <text:p/>
        </draw:connector>
        <draw:connector draw:style-name="gr16" draw:text-style-name="P12" draw:layer="layout" draw:line-skew="-0.5cm" svg:x1="12.75cm" svg:y1="10cm" svg:x2="15.751cm" svg:y2="14cm" draw:start-shape="id7" draw:start-glue-point="2" draw:end-shape="id6" draw:end-glue-point="8" svg:d="M12750 10000v1500h3001v2500" svg:viewBox="0 0 3002 4001">
          <text:p/>
        </draw:connector>
        <draw:connector draw:style-name="gr17" draw:text-style-name="P12" draw:layer="layout" draw:line-skew="0.625cm" svg:x1="2.875cm" svg:y1="11.75cm" svg:x2="11.751cm" svg:y2="14cm" draw:start-shape="id8" draw:start-glue-point="2" draw:end-shape="id6" draw:end-glue-point="5" svg:d="M2875 11750v1750h8876v500" svg:viewBox="0 0 8877 2251">
          <text:p/>
        </draw:connector>
        <draw:custom-shape draw:style-name="gr18" draw:text-style-name="P4" xml:id="id9" draw:id="id9" draw:layer="layout" svg:width="3cm" svg:height="0.999cm" svg:x="13.5cm" svg:y="3.751cm">
          <text:p text:style-name="P3">GNOME</text:p>
          <draw:enhanced-geometry svg:viewBox="0 0 21600 21600" draw:type="rectangle" draw:enhanced-path="M 0 0 L 21600 0 21600 21600 0 21600 0 0 Z N"/>
        </draw:custom-shape>
        <draw:custom-shape draw:style-name="gr19" draw:text-style-name="P11" xml:id="id11" draw:id="id11" draw:layer="layout" svg:width="2.5cm" svg:height="1cm" svg:x="11.49cm" svg:y="7.5cm">
          <text:p text:style-name="P3">D-Bus</text:p>
          <draw:enhanced-geometry svg:viewBox="0 0 21600 21600" draw:type="rectangle" draw:enhanced-path="M 0 0 L 21600 0 21600 21600 0 21600 0 0 Z N"/>
        </draw:custom-shape>
        <draw:connector draw:style-name="gr20" draw:text-style-name="P12" draw:layer="layout" svg:x1="15cm" svg:y1="4.75cm" svg:x2="13.25cm" svg:y2="6.252cm" draw:start-shape="id9" draw:start-glue-point="2" draw:end-shape="id10" draw:end-glue-point="5" svg:d="M15000 4750v750h-1750v752" svg:viewBox="0 0 1751 1503">
          <text:p/>
        </draw:connector>
        <draw:connector draw:style-name="gr21" draw:text-style-name="P12" draw:layer="layout" svg:x1="12.74cm" svg:y1="8.5cm" svg:x2="12.75cm" svg:y2="9.001cm" draw:start-shape="id11" draw:start-glue-point="2" draw:end-shape="id7" draw:end-glue-point="0" svg:d="M12740 8500v250h10v251" svg:viewBox="0 0 11 502">
          <text:p/>
        </draw:connector>
        <draw:custom-shape draw:style-name="gr22" draw:text-style-name="P5" xml:id="id12" draw:id="id12" draw:layer="layout" svg:width="5.75cm" svg:height="0.999cm" svg:x="2.25cm" svg:y="8.75cm">
          <draw:glue-point draw:id="4" svg:x="-2.826cm" svg:y="-4.994cm"/>
          <text:p text:style-name="P3">systemd-networkd</text:p>
          <draw:enhanced-geometry svg:viewBox="0 0 21600 21600" draw:type="rectangle" draw:enhanced-path="M 0 0 L 21600 0 21600 21600 0 21600 0 0 Z N"/>
        </draw:custom-shape>
        <draw:connector draw:style-name="gr23" draw:text-style-name="P12" draw:layer="layout" draw:line-skew="1.126cm" svg:x1="5.125cm" svg:y1="9.749cm" svg:x2="12.751cm" svg:y2="14cm" draw:start-shape="id12" draw:start-glue-point="2" draw:end-shape="id6" draw:end-glue-point="4" svg:d="M5125 9749v3251h7626v1000" svg:viewBox="0 0 7627 4252">
          <text:p/>
        </draw:connector>
        <draw:custom-shape draw:style-name="gr24" draw:text-style-name="P4" xml:id="id13" draw:id="id13" draw:layer="layout" svg:width="2cm" svg:height="1cm" svg:x="11cm" svg:y="3.75cm">
          <text:p text:style-name="P3">nmcli</text:p>
          <draw:enhanced-geometry svg:viewBox="0 0 21600 21600" draw:type="rectangle" draw:enhanced-path="M 0 0 L 21600 0 21600 21600 0 21600 0 0 Z N"/>
        </draw:custom-shape>
        <draw:connector draw:style-name="gr25" draw:text-style-name="P12" draw:layer="layout" svg:x1="12cm" svg:y1="4.75cm" svg:x2="12cm" svg:y2="6.252cm" draw:start-shape="id13" draw:start-glue-point="2" draw:end-shape="id10" draw:end-glue-point="6" svg:d="M12000 4750v1502" svg:viewBox="0 0 1 1503">
          <text:p/>
        </draw:connector>
        <draw:custom-shape draw:style-name="gr26" draw:text-style-name="P4" xml:id="id14" draw:id="id14" draw:layer="layout" svg:width="4cm" svg:height="0.999cm" svg:x="17cm" svg:y="3.75cm">
          <text:p text:style-name="P3">firewall-cmd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svg:x1="19cm" svg:y1="4.749cm" svg:x2="19cm" svg:y2="5.249cm" draw:start-shape="id14" draw:start-glue-point="2" draw:end-shape="id15" draw:end-glue-point="0" svg:d="M19000 4749v500" svg:viewBox="0 0 1 501">
          <text:p/>
        </draw:connector>
        <draw:frame draw:style-name="gr28" draw:text-style-name="P15" draw:layer="layout" svg:width="8.939cm" svg:height="4.515cm" svg:x="0cm" svg:y="-0.25cm">
          <draw:text-box>
            <text:p text:style-name="P13"><text:span text:style-name="T1">Continuously running daemon</text:span></text:p>
            <text:p text:style-name="P13"><text:span text:style-name="T2">Non-daemon process</text:span></text:p>
            <text:p text:style-name="P13"><text:span text:style-name="T3">Library</text:span></text:p>
            <text:p text:style-name="P14"><text:span text:style-name="T4">API</text:span></text:p>
          </draw:text-box>
        </draw:frame>
        <draw:custom-shape draw:style-name="gr19" draw:text-style-name="P11" xml:id="id15" draw:id="id15" draw:layer="layout" svg:width="2.5cm" svg:height="1cm" svg:x="17.75cm" svg:y="5.249cm">
          <text:p text:style-name="P3">D-Bus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svg:x1="19cm" svg:y1="6.249cm" svg:x2="19cm" svg:y2="6.752cm" draw:start-shape="id15" draw:start-glue-point="2" draw:end-shape="id1" draw:end-glue-point="0" svg:d="M19000 6249v503" svg:viewBox="0 0 1 504">
          <text:p/>
        </draw:connector>
        <draw:connector draw:style-name="gr30" draw:text-style-name="P12" draw:layer="layout" svg:x1="17.5cm" svg:y1="7.251cm" svg:x2="15.5cm" svg:y2="9.5cm" draw:start-shape="id1" draw:start-glue-point="3" draw:end-shape="id7" draw:end-glue-point="1" svg:d="M17500 7251h-1000v2249h-1000" svg:viewBox="0 0 2001 2250">
          <text:p/>
        </draw:connector>
        <draw:custom-shape draw:style-name="gr31" draw:text-style-name="P16" xml:id="id2" draw:id="id2" draw:layer="layout" svg:width="4cm" svg:height="0.999cm" svg:x="19.75cm" svg:y="8.75cm">
          <draw:glue-point draw:id="4" svg:x="1.25cm" svg:y="-4.994cm"/>
          <text:p text:style-name="P3">libnftables</text:p>
          <draw:enhanced-geometry svg:viewBox="0 0 21600 21600" draw:type="rectangle" draw:enhanced-path="M 0 0 L 21600 0 21600 21600 0 21600 0 0 Z N"/>
        </draw:custom-shape>
        <draw:connector draw:style-name="gr32" draw:text-style-name="P12" draw:layer="layout" svg:x1="22.25cm" svg:y1="4.75cm" svg:x2="22.25cm" svg:y2="8.751cm" draw:start-shape="id16" draw:start-glue-point="2" draw:end-shape="id2" draw:end-glue-point="4" svg:d="M22250 4750v4001" svg:viewBox="0 0 1 4002">
          <text:p/>
        </draw:connector>
        <draw:connector draw:style-name="gr33" draw:text-style-name="P12" draw:layer="layout" svg:x1="21.75cm" svg:y1="11.249cm" svg:x2="21.75cm" svg:y2="11.75cm" draw:start-shape="id17" draw:start-glue-point="2" draw:end-shape="id18" draw:end-glue-point="0" svg:d="M21750 11249v501" svg:viewBox="0 0 1 502">
          <text:p/>
        </draw:connector>
        <draw:custom-shape draw:style-name="gr34" draw:text-style-name="P16" xml:id="id17" draw:id="id17" draw:layer="layout" svg:width="2.5cm" svg:height="0.999cm" svg:x="20.5cm" svg:y="10.25cm">
          <text:p text:style-name="P3">libnftnl</text:p>
          <draw:enhanced-geometry svg:viewBox="0 0 21600 21600" draw:type="rectangle" draw:enhanced-path="M 0 0 L 21600 0 21600 21600 0 21600 0 0 Z N"/>
        </draw:custom-shape>
        <draw:connector draw:style-name="gr35" draw:text-style-name="P12" draw:layer="layout" svg:x1="21.75cm" svg:y1="9.749cm" svg:x2="21.75cm" svg:y2="10.25cm" draw:start-shape="id2" draw:start-glue-point="2" draw:end-shape="id17" draw:end-glue-point="0" svg:d="M21750 9749v501" svg:viewBox="0 0 1 502">
          <text:p/>
        </draw:connector>
        <draw:custom-shape draw:style-name="gr34" draw:text-style-name="P16" xml:id="id18" draw:id="id18" draw:layer="layout" svg:width="2.5cm" svg:height="0.999cm" svg:x="20.5cm" svg:y="11.75cm">
          <text:p text:style-name="P3">libmnl</text:p>
          <draw:enhanced-geometry svg:viewBox="0 0 21600 21600" draw:type="rectangle" draw:enhanced-path="M 0 0 L 21600 0 21600 21600 0 21600 0 0 Z N"/>
        </draw:custom-shape>
        <draw:connector draw:style-name="gr36" draw:text-style-name="P12" draw:layer="layout" svg:x1="21.75cm" svg:y1="12.749cm" svg:x2="21.749cm" svg:y2="14cm" draw:start-shape="id18" draw:start-glue-point="2" draw:end-shape="id6" draw:end-glue-point="10" svg:d="M21750 12749v625h-1v626" svg:viewBox="0 0 2 1252">
          <text:p/>
        </draw:connector>
        <draw:custom-shape draw:style-name="gr34" draw:text-style-name="P16" xml:id="id10" draw:id="id10" draw:layer="layout" svg:width="2.5cm" svg:height="0.999cm" svg:x="11.5cm" svg:y="6.251cm">
          <draw:glue-point draw:id="4" svg:x="-2cm" svg:y="-4.994cm"/>
          <draw:glue-point draw:id="5" svg:x="2cm" svg:y="-4.994cm"/>
          <draw:glue-point draw:id="6" svg:x="-3cm" svg:y="-4.994cm"/>
          <text:p text:style-name="P3">libnm</text:p>
          <draw:enhanced-geometry svg:viewBox="0 0 21600 21600" draw:type="rectangle" draw:enhanced-path="M 0 0 L 21600 0 21600 21600 0 21600 0 0 Z N"/>
        </draw:custom-shape>
        <draw:connector draw:style-name="gr37" draw:text-style-name="P12" draw:layer="layout" svg:x1="12.75cm" svg:y1="7.25cm" svg:x2="12.74cm" svg:y2="7.5cm" draw:start-shape="id10" draw:start-glue-point="2" draw:end-shape="id11" draw:end-glue-point="0" svg:d="M12750 7250v125h-10v125" svg:viewBox="0 0 11 251">
          <text:p/>
        </draw:connector>
        <draw:frame draw:style-name="gr38" draw:text-style-name="P8" draw:layer="layout" svg:width="1.808cm" svg:height="0.962cm" svg:x="26.75cm" svg:y="5.25cm">
          <draw:text-box>
            <text:p>shell</text:p>
          </draw:text-box>
        </draw:frame>
        <draw:line draw:style-name="gr10" draw:text-style-name="P3" draw:layer="layout" svg:x1="16.75cm" svg:y1="14.75cm" svg:x2="16.75cm" svg:y2="1.75cm">
          <text:p/>
        </draw:line>
        <draw:custom-shape draw:style-name="gr39" draw:text-style-name="P4" xml:id="id4" draw:id="id4" draw:layer="layout" svg:width="4cm" svg:height="1.5cm" svg:x="23.5cm" svg:y="3.75cm">
          <text:p text:style-name="P3">iptables-nft tools</text:p>
          <draw:enhanced-geometry svg:viewBox="0 0 21600 21600" draw:type="rectangle" draw:enhanced-path="M 0 0 L 21600 0 21600 21600 0 21600 0 0 Z N"/>
        </draw:custom-shape>
        <draw:connector draw:style-name="gr40" draw:text-style-name="P12" draw:layer="layout" svg:x1="25.5cm" svg:y1="5.25cm" svg:x2="23cm" svg:y2="10.749cm" draw:start-shape="id4" draw:start-glue-point="2" draw:end-shape="id17" draw:end-glue-point="1" svg:d="M25500 5250v5499h-2500" svg:viewBox="0 0 2501 5500">
          <text:p/>
        </draw:connector>
        <draw:custom-shape draw:style-name="gr41" draw:text-style-name="P16" xml:id="id5" draw:id="id5" draw:layer="layout" svg:width="3cm" svg:height="0.999cm" svg:x="7.5cm" svg:y="6.251cm">
          <draw:glue-point draw:id="4" svg:x="-2.5cm" svg:y="-4.994cm"/>
          <text:p text:style-name="P3">libnetlink</text:p>
          <draw:enhanced-geometry svg:viewBox="0 0 21600 21600" draw:type="rectangle" draw:enhanced-path="M 0 0 L 21600 0 21600 21600 0 21600 0 0 Z N"/>
        </draw:custom-shape>
        <draw:connector draw:style-name="gr42" draw:text-style-name="P12" draw:layer="layout" svg:x1="8.25cm" svg:y1="4.749cm" svg:x2="8.25cm" svg:y2="6.252cm" draw:start-shape="id19" draw:start-glue-point="2" draw:end-shape="id5" draw:end-glue-point="4" svg:d="M8250 4749v1503" svg:viewBox="0 0 1 1504">
          <text:p/>
        </draw:connector>
        <draw:custom-shape draw:style-name="gr43" draw:text-style-name="P5" xml:id="id20" draw:id="id20" draw:layer="layout" svg:width="2cm" svg:height="0.999cm" svg:x="9.49cm" svg:y="10.501cm">
          <text:p text:style-name="P3">udev</text:p>
          <draw:enhanced-geometry svg:viewBox="0 0 21600 21600" draw:type="rectangle" draw:enhanced-path="M 0 0 L 21600 0 21600 21600 0 21600 0 0 Z N"/>
        </draw:custom-shape>
        <draw:connector draw:style-name="gr44" draw:text-style-name="P12" draw:layer="layout" draw:line-skew="-0.75cm" svg:x1="10.49cm" svg:y1="11.5cm" svg:x2="14.751cm" svg:y2="14cm" draw:start-shape="id20" draw:start-glue-point="2" draw:end-shape="id6" draw:end-glue-point="9" svg:d="M10490 11500v500h4261v2000" svg:viewBox="0 0 4262 2501">
          <text:p/>
        </draw:connector>
        <draw:connector draw:style-name="gr45" draw:text-style-name="P12" draw:layer="layout" svg:x1="10.491cm" svg:y1="9.999cm" svg:x2="10.49cm" svg:y2="10.501cm" draw:start-shape="id7" draw:start-glue-point="4" draw:end-shape="id20" draw:end-glue-point="0" svg:d="M10491 9999v251h-1v251" svg:viewBox="0 0 2 503">
          <text:p/>
        </draw:connector>
        <draw:custom-shape draw:style-name="gr46" draw:text-style-name="P4" xml:id="id22" draw:id="id22" draw:layer="layout" svg:width="2.75cm" svg:height="0.999cm" svg:x="2.75cm" svg:y="3.751cm">
          <draw:glue-point draw:id="4" svg:x="2.272cm" svg:y="5.005cm"/>
          <draw:glue-point draw:id="5" svg:x="-2.272cm" svg:y="5.005cm"/>
          <text:p text:style-name="P3">netplan</text:p>
          <draw:enhanced-geometry svg:viewBox="0 0 21600 21600" draw:type="rectangle" draw:enhanced-path="M 0 0 L 21600 0 21600 21600 0 21600 0 0 Z N"/>
        </draw:custom-shape>
        <draw:connector draw:style-name="gr47" draw:text-style-name="P12" draw:layer="layout" draw:line-skew="1.12cm" svg:x1="4.749cm" svg:y1="7.749cm" svg:x2="10cm" svg:y2="9.5cm" draw:start-shape="id21" draw:start-glue-point="3" draw:end-shape="id7" draw:end-glue-point="3" svg:d="M4749 7749h3746v1751h1505" svg:viewBox="0 0 5252 1752">
          <text:p/>
        </draw:connector>
        <draw:connector draw:style-name="gr48" draw:text-style-name="P12" draw:layer="layout" svg:x1="3.501cm" svg:y1="4.749cm" svg:x2="3.501cm" svg:y2="8.751cm" draw:start-shape="id22" draw:start-glue-point="5" draw:end-shape="id12" draw:end-glue-point="4" svg:d="M3501 4749v4002" svg:viewBox="0 0 1 4003">
          <text:p/>
        </draw:connector>
        <draw:connector draw:style-name="gr49" draw:text-style-name="P3" xml:id="id21" draw:id="id21" draw:layer="layout" svg:x1="4.749cm" svg:y1="4.749cm" svg:x2="4.749cm" svg:y2="7.749cm" draw:start-shape="id22" draw:start-glue-point="4" svg:d="M4749 4749v3000" svg:viewBox="0 0 1 3001">
          <text:p/>
        </draw:connector>
        <draw:frame draw:style-name="gr50" draw:text-style-name="P8" draw:layer="layout" svg:width="2.514cm" svg:height="0.962cm" svg:x="4.736cm" svg:y="4.788cm">
          <draw:text-box>
            <text:p>configs</text:p>
          </draw:text-box>
        </draw:frame>
        <draw:frame draw:style-name="gr50" draw:text-style-name="P8" draw:layer="layout" svg:width="2.514cm" svg:height="0.962cm" svg:x="1cm" svg:y="4.75cm">
          <draw:text-box>
            <text:p>config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d42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4T13:19:27.255301636</meta:creation-date>
    <dc:date>2026-06-25T22:35:29.056193418</dc:date>
    <meta:editing-duration>P1DT8H38M46S</meta:editing-duration>
    <meta:editing-cycles>60</meta:editing-cycles>
    <meta:generator>LibreOffice/25.2.3.2$Linux_X86_64 LibreOffice_project/520$Build-2</meta:generator>
    <meta:document-statistic meta:object-count="55"/>
  </office:meta>
</office:document-meta>
</file>