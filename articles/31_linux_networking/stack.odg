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9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439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="solid" draw:fill-color="#ff972f"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972f" draw:textarea-vertical-align="middle" draw:auto-grow-height="false" fo:min-height="0.749cm" fo:min-width="2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39" style:family="graphic" style:parent-style-name="standard">
      <style:graphic-properties svg:stroke-color="#000000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ff972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3" style:family="graphic" style:parent-style-name="standard">
      <style:graphic-properties svg:stroke-color="#000000" draw:fill="solid" draw:fill-color="#729fcf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textarea-vertical-align="middle" draw:auto-grow-height="false" fo:min-height="0.749cm" fo:min-width="2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9" style:family="graphic" style:parent-style-name="standard">
      <style:graphic-properties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ff972f"/>
      <style:paragraph-properties fo:text-align="center" style:writing-mode="lr-tb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4" xml:id="id19" draw:id="id19" draw:layer="layout" svg:width="4.5cm" svg:height="0.999cm" svg:x="6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0.999cm" svg:x="10.01cm" svg:y="10.251cm">
          <draw:glue-point draw:id="4" svg:x="-4.109cm" svg:y="5.005cm"/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5cm" svg:height="1.673cm" svg:x="12.25cm" svg:y="1.75cm">
          <draw:text-box>
            <text:p text:style-name="P6">Configuration</text:p>
          </draw:text-box>
        </draw:frame>
        <draw:frame draw:style-name="gr7" draw:text-style-name="P8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10" xml:id="id8" draw:id="id8" draw:layer="layout" svg:width="3.75cm" svg:height="1.5cm" svg:x="1cm" svg:y="10.25cm">
          <text:p text:style-name="P9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0cm" svg:height="2.5cm" svg:x="11.75cm" svg:y="14cm">
          <draw:glue-point draw:id="4" svg:x="-3cm" svg:y="-5cm"/>
          <draw:glue-point draw:id="5" svg:x="-4cm" svg:y="-5cm"/>
          <draw:glue-point draw:id="6" svg:x="2.5cm" svg:y="-5cm" draw:escape-direction="up"/>
          <draw:glue-point draw:id="7" svg:x="-2cm" svg:y="-5cm"/>
          <draw:glue-point draw:id="8" svg:x="-1cm" svg:y="-5cm"/>
          <text:p text:style-name="P3">Netlink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5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2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2" draw:layer="layout" draw:line-skew="2.375cm" svg:x1="9cm" svg:y1="7.25cm" svg:x2="14.75cm" svg:y2="14cm" draw:start-shape="id5" draw:start-glue-point="2" draw:end-shape="id6" draw:end-glue-point="7" svg:d="M9000 7250v5750h5750v1000" svg:viewBox="0 0 5751 6751">
          <text:p/>
        </draw:connector>
        <draw:connector draw:style-name="gr16" draw:text-style-name="P12" draw:layer="layout" draw:line-skew="0.125cm" svg:x1="12.76cm" svg:y1="11.25cm" svg:x2="15.75cm" svg:y2="14cm" draw:start-shape="id7" draw:start-glue-point="2" draw:end-shape="id6" draw:end-glue-point="8" svg:d="M12760 11250v1500h2990v1250" svg:viewBox="0 0 2991 2751">
          <text:p/>
        </draw:connector>
        <draw:connector draw:style-name="gr17" draw:text-style-name="P12" draw:layer="layout" draw:line-skew="0.625cm" svg:x1="2.875cm" svg:y1="11.75cm" svg:x2="12.75cm" svg:y2="14cm" draw:start-shape="id8" draw:start-glue-point="2" draw:end-shape="id6" draw:end-glue-point="5" svg:d="M2875 11750v1750h9875v500" svg:viewBox="0 0 9876 2251">
          <text:p/>
        </draw:connector>
        <draw:custom-shape draw:style-name="gr18" draw:text-style-name="P4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2.5cm" svg:height="1cm" svg:x="11.5cm" svg:y="8.7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svg:x1="15cm" svg:y1="4.75cm" svg:x2="13.25cm" svg:y2="6.252cm" draw:start-shape="id9" draw:start-glue-point="2" draw:end-shape="id10" draw:end-glue-point="5" svg:d="M15000 4750v750h-1750v752" svg:viewBox="0 0 1751 1503">
          <text:p/>
        </draw:connector>
        <draw:connector draw:style-name="gr21" draw:text-style-name="P12" draw:layer="layout" svg:x1="12.75cm" svg:y1="9.75cm" svg:x2="12.76cm" svg:y2="10.251cm" draw:start-shape="id11" draw:start-glue-point="2" draw:end-shape="id7" draw:end-glue-point="0" svg:d="M12750 9750v250h10v251" svg:viewBox="0 0 11 502">
          <text:p/>
        </draw:connector>
        <draw:custom-shape draw:style-name="gr22" draw:text-style-name="P5" xml:id="id12" draw:id="id12" draw:layer="layout" svg:width="5.75cm" svg:height="0.999cm" svg:x="2.25cm" svg:y="8.75cm">
          <draw:glue-point draw:id="4" svg:x="-2.826cm" svg:y="-4.994cm"/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1.376cm" svg:x1="5.125cm" svg:y1="9.749cm" svg:x2="13.75cm" svg:y2="14cm" draw:start-shape="id12" draw:start-glue-point="2" draw:end-shape="id6" draw:end-glue-point="4" svg:d="M5125 9749v3501h8625v750" svg:viewBox="0 0 8626 4252">
          <text:p/>
        </draw:connector>
        <draw:custom-shape draw:style-name="gr24" draw:text-style-name="P4" xml:id="id13" draw:id="id13" draw:layer="layout" svg:width="2cm" svg:height="1cm" svg:x="11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12cm" svg:y1="4.75cm" svg:x2="12cm" svg:y2="6.252cm" draw:start-shape="id13" draw:start-glue-point="2" draw:end-shape="id10" draw:end-glue-point="6" svg:d="M12000 4750v1502" svg:viewBox="0 0 1 1503">
          <text:p/>
        </draw:connector>
        <draw:custom-shape draw:style-name="gr26" draw:text-style-name="P4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28" draw:text-style-name="P8" draw:layer="layout" svg:width="8.939cm" svg:height="3.095cm" svg:x="0.061cm" svg:y="1.25cm">
          <draw:text-box>
            <text:p><text:span text:style-name="T1">Continuously running daemon</text:span></text:p>
            <text:p><text:span text:style-name="T2">Non-daemon process</text:span></text:p>
            <text:p><text:span text:style-name="T3">Library</text:span></text:p>
            <text:p text:style-name="P13"><text:span text:style-name="T4">API</text:span></text:p>
          </draw:text-box>
        </draw:frame>
        <draw:custom-shape draw:style-name="gr19" draw:text-style-name="P11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30" draw:text-style-name="P12" draw:layer="layout" svg:x1="17.5cm" svg:y1="7.251cm" svg:x2="15.51cm" svg:y2="10.75cm" draw:start-shape="id1" draw:start-glue-point="3" draw:end-shape="id7" draw:end-glue-point="1" svg:d="M17500 7251h-995v3499h-995" svg:viewBox="0 0 1991 3500">
          <text:p/>
        </draw:connector>
        <draw:custom-shape draw:style-name="gr31" draw:text-style-name="P14" xml:id="id2" draw:id="id2" draw:layer="layout" svg:width="4cm" svg:height="0.999cm" svg:x="19.75cm" svg:y="8.7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22.25cm" svg:y1="4.75cm" svg:x2="22.25cm" svg:y2="8.751cm" draw:start-shape="id16" draw:start-glue-point="2" draw:end-shape="id2" draw:end-glue-point="4" svg:d="M22250 4750v4001" svg:viewBox="0 0 1 4002">
          <text:p/>
        </draw:connector>
        <draw:connector draw:style-name="gr33" draw:text-style-name="P12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4" draw:text-style-name="P14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4" draw:text-style-name="P14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21.75cm" svg:y1="12.749cm" svg:x2="19.25cm" svg:y2="14cm" draw:start-shape="id18" draw:start-glue-point="2" draw:end-shape="id6" draw:end-glue-point="6" svg:d="M21750 12749v625h-2500v626" svg:viewBox="0 0 2501 1252">
          <text:p/>
        </draw:connector>
        <draw:custom-shape draw:style-name="gr34" draw:text-style-name="P14" xml:id="id10" draw:id="id10" draw:layer="layout" svg:width="2.5cm" svg:height="0.999cm" svg:x="11.5cm" svg:y="6.251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12.75cm" svg:y1="7.25cm" svg:x2="12.75cm" svg:y2="8.75cm" draw:start-shape="id10" draw:start-glue-point="2" draw:end-shape="id11" draw:end-glue-point="0" svg:d="M12750 7250v1500" svg:viewBox="0 0 1 1501">
          <text:p/>
        </draw:connector>
        <draw:frame draw:style-name="gr38" draw:text-style-name="P8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9" draw:text-style-name="P4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41" draw:text-style-name="P14" xml:id="id5" draw:id="id5" draw:layer="layout" svg:width="3cm" svg:height="0.999cm" svg:x="7.5cm" svg:y="6.251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2" draw:text-style-name="P12" draw:layer="layout" svg:x1="8.25cm" svg:y1="4.749cm" svg:x2="8.25cm" svg:y2="6.252cm" draw:start-shape="id19" draw:start-glue-point="2" draw:end-shape="id5" draw:end-glue-point="4" svg:d="M8250 4749v1503" svg:viewBox="0 0 1 1504">
          <text:p/>
        </draw:connector>
        <draw:custom-shape draw:style-name="gr43" draw:text-style-name="P5" xml:id="id20" draw:id="id20" draw:layer="layout" svg:width="2cm" svg:height="0.999cm" svg:x="9.5cm" svg:y="11.751cm">
          <text:p text:style-name="P3">udev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10.5cm" svg:y1="12.75cm" svg:x2="10.5cm" svg:y2="15.501cm" draw:start-shape="id20" draw:start-glue-point="2" svg:d="M10500 12750v2751" svg:viewBox="0 0 1 2752">
          <text:p/>
        </draw:connector>
        <draw:connector draw:style-name="gr45" draw:text-style-name="P12" draw:layer="layout" svg:x1="10.501cm" svg:y1="11.249cm" svg:x2="10.5cm" svg:y2="11.751cm" draw:start-shape="id7" draw:start-glue-point="4" draw:end-shape="id20" draw:end-glue-point="0" svg:d="M10501 11249v251h-1v251" svg:viewBox="0 0 2 503">
          <text:p/>
        </draw:connector>
        <draw:custom-shape draw:style-name="gr46" draw:text-style-name="P4" xml:id="id22" draw:id="id22" draw:layer="layout" svg:width="2.75cm" svg:height="0.999cm" svg:x="2.75cm" svg:y="3.751cm">
          <draw:glue-point draw:id="4" svg:x="2.272cm" svg:y="5.005cm"/>
          <draw:glue-point draw:id="5" svg:x="-2.272cm" svg:y="5.005cm"/>
          <text:p text:style-name="P3">netplan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draw:line-skew="1.12cm" svg:x1="4.749cm" svg:y1="7.749cm" svg:x2="10.01cm" svg:y2="10.75cm" draw:start-shape="id21" draw:start-glue-point="3" draw:end-shape="id7" draw:end-glue-point="3" svg:d="M4749 7749h3751v3001h1510" svg:viewBox="0 0 5262 3002">
          <text:p/>
        </draw:connector>
        <draw:connector draw:style-name="gr48" draw:text-style-name="P12" draw:layer="layout" svg:x1="3.501cm" svg:y1="4.749cm" svg:x2="3.501cm" svg:y2="8.751cm" draw:start-shape="id22" draw:start-glue-point="5" draw:end-shape="id12" draw:end-glue-point="4" svg:d="M3501 4749v4002" svg:viewBox="0 0 1 4003">
          <text:p/>
        </draw:connector>
        <draw:connector draw:style-name="gr49" draw:text-style-name="P3" xml:id="id21" draw:id="id21" draw:layer="layout" svg:x1="4.749cm" svg:y1="4.749cm" svg:x2="4.749cm" svg:y2="7.749cm" draw:start-shape="id22" draw:start-glue-point="4" svg:d="M4749 4749v3000" svg:viewBox="0 0 1 3001">
          <text:p/>
        </draw:connector>
        <draw:frame draw:style-name="gr50" draw:text-style-name="P8" draw:layer="layout" svg:width="2.514cm" svg:height="0.962cm" svg:x="4.736cm" svg:y="4.788cm">
          <draw:text-box>
            <text:p>configs</text:p>
          </draw:text-box>
        </draw:frame>
        <draw:frame draw:style-name="gr50" draw:text-style-name="P8" draw:layer="layout" svg:width="2.514cm" svg:height="0.962cm" svg:x="1cm" svg:y="4.75cm">
          <draw:text-box>
            <text:p>config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5T13:39:57.737049260</dc:date>
    <meta:editing-duration>P1DT7M34S</meta:editing-duration>
    <meta:editing-cycles>56</meta:editing-cycles>
    <meta:generator>LibreOffice/25.2.3.2$Linux_X86_64 LibreOffice_project/520$Build-2</meta:generator>
    <meta:document-statistic meta:object-count="55"/>
  </office:meta>
</office:document-meta>
</file>