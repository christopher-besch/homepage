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75cm" fo:min-width="0cm" loext:decorative="false"/>
      <style:paragraph-properties style:writing-mode="lr-tb"/>
    </style:style>
    <style:style style:name="gr3" style:family="graphic" style:parent-style-name="standard">
      <style:graphic-properties svg:stroke-color="#000000" draw:textarea-vertical-align="middle" draw:auto-grow-height="false" fo:min-height="0.749cm" fo:min-width="4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textarea-vertical-align="middle" draw:auto-grow-height="false" fo:min-height="0.75cm" fo:min-width="1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729fcf" draw:textarea-vertical-align="middle" draw:auto-grow-height="false" fo:min-height="0.749cm" fo:min-width="5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000000" draw:fill="solid" draw:fill-color="#729fcf" draw:textarea-vertical-align="middle" draw:auto-grow-height="false" fo:min-height="1.25cm" fo:min-width="3.25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bbe33d" draw:textarea-vertical-align="middle" draw:auto-grow-height="false" fo:min-height="2.25cm" fo:min-width="11.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Long_20_Dash" svg:stroke-color="#000000" svg:stroke-linecap="butt" draw:textarea-vertical-align="middle" loext:decorative="false"/>
    </style:style>
    <style:style style:name="gr11" style:family="graphic" style:parent-style-name="standard">
      <style:graphic-properties svg:stroke-color="#000000" draw:fill="solid" draw:fill-color="#729fcf" draw:textarea-vertical-align="middle" draw:auto-grow-height="false" fo:min-height="0.749cm" fo:min-width="2.5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textarea-vertical-align="middle" draw:auto-grow-height="false" fo:min-height="2.25cm" fo:min-width="4.75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8" style:family="graphic" style:parent-style-name="standard">
      <style:graphic-properties draw:textarea-vertical-align="middle" draw:auto-grow-height="false" fo:min-height="0.749cm" fo:min-width="2.5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bbe33d" draw:textarea-vertical-align="middle" draw:auto-grow-height="false" fo:min-height="0.75cm" fo:min-width="2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2" style:family="graphic" style:parent-style-name="standard">
      <style:graphic-properties draw:fill="solid" draw:fill-color="#729fcf" draw:textarea-vertical-align="middle" draw:auto-grow-height="false" fo:min-height="0.749cm" fo:min-width="5.25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6" style:family="graphic" style:parent-style-name="standard">
      <style:graphic-properties draw:textarea-vertical-align="middle" draw:auto-grow-height="false" fo:min-height="0.749cm" fo:min-width="3.5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cm" fo:min-width="18.534cm" loext:decorative="false"/>
      <style:paragraph-properties style:writing-mode="lr-tb"/>
    </style:style>
    <style:style style:name="gr29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31" style:family="graphic" style:parent-style-name="standard">
      <style:graphic-properties svg:stroke-color="#000000" draw:fill="solid" draw:fill-color="#ff972f" draw:textarea-vertical-align="middle" draw:auto-grow-height="false" fo:min-height="0.749cm" fo:min-width="3.5cm" style:writing-mode="lr-tb" loext:decorative="false"/>
      <style:paragraph-properties style:writing-mode="lr-tb"/>
    </style:style>
    <style:style style:name="gr32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4" style:family="graphic" style:parent-style-name="standard">
      <style:graphic-properties svg:stroke-color="#000000" draw:fill="solid" draw:fill-color="#ff972f" draw:textarea-vertical-align="middle" draw:auto-grow-height="false" fo:min-height="0.749cm" fo:min-width="2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8cm" loext:decorative="false"/>
      <style:paragraph-properties style:writing-mode="lr-tb"/>
    </style:style>
    <style:style style:name="gr39" style:family="graphic" style:parent-style-name="standard">
      <style:graphic-properties svg:stroke-color="#000000" draw:textarea-vertical-align="middle" draw:auto-grow-height="false" fo:min-height="1.25cm" fo:min-width="3.5cm" style:writing-mode="lr-tb" loext:decorative="false"/>
      <style:paragraph-properties style:writing-mode="lr-tb"/>
    </style:style>
    <style:style style:name="gr40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1" style:family="graphic" style:parent-style-name="standard">
      <style:graphic-properties svg:stroke-color="#000000" draw:fill="solid" draw:fill-color="#ff972f" draw:textarea-vertical-align="middle" draw:auto-grow-height="false" fo:min-height="0.749cm" fo:min-width="2.5cm" style:writing-mode="lr-tb" loext:decorative="false"/>
      <style:paragraph-properties style:writing-mode="lr-tb"/>
    </style:style>
    <style:style style:name="gr42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43" style:family="graphic" style:parent-style-name="standard">
      <style:graphic-properties svg:stroke-color="#000000" draw:fill="solid" draw:fill-color="#729fcf" draw:textarea-vertical-align="middle" draw:auto-grow-height="false" fo:min-height="0.749cm" fo:min-width="1.5cm" style:writing-mode="lr-tb" loext:decorative="false"/>
      <style:paragraph-properties style:writing-mode="lr-tb"/>
    </style:style>
    <style:style style:name="gr4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6" style:family="graphic" style:parent-style-name="standard">
      <style:graphic-properties svg:stroke-color="#000000" draw:textarea-vertical-align="middle" draw:auto-grow-height="false" fo:min-height="0.749cm" fo:min-width="2.25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49" style:family="graphic" style:parent-style-name="standard">
      <style:graphic-properties draw:textarea-vertical-align="middle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4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729fcf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</style:style>
    <style:style style:name="P11" style:family="paragraph">
      <loext:graphic-properties draw:fill="solid" draw:fill-color="#bbe33d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972f"/>
      <style:paragraph-properties fo:text-align="center" style:writing-mode="lr-tb"/>
    </style:style>
    <style:style style:name="T1" style:family="text">
      <style:text-properties fo:background-color="#729fcf"/>
    </style:style>
    <style:style style:name="T2" style:family="text">
      <style:text-properties fo:background-color="transparent"/>
    </style:style>
    <style:style style:name="T3" style:family="text">
      <style:text-properties fo:background-color="#ffd428"/>
    </style:style>
    <style:style style:name="T4" style:family="text">
      <style:text-properties fo:background-color="#ff972f"/>
    </style:style>
    <style:style style:name="T5" style:family="text">
      <style:text-properties fo:background-color="#bbe33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5cm" svg:height="1.25cm" svg:x="29.5cm" svg:y="13.35cm">
          <draw:text-box>
            <text:p text:style-name="P1">Kernel space</text:p>
          </draw:text-box>
        </draw:frame>
        <draw:frame draw:style-name="gr2" draw:text-style-name="P2" draw:layer="layout" svg:width="5cm" svg:height="1cm" svg:x="29.75cm" svg:y="12.35cm">
          <draw:text-box>
            <text:p text:style-name="P1">User space</text:p>
          </draw:text-box>
        </draw:frame>
        <draw:custom-shape draw:style-name="gr3" draw:text-style-name="P4" xml:id="id19" draw:id="id19" draw:layer="layout" svg:width="4.5cm" svg:height="0.999cm" svg:x="6cm" svg:y="2.35cm">
          <text:p text:style-name="P3">iproute2 tools</text:p>
          <draw:enhanced-geometry svg:viewBox="0 0 21600 21600" draw:type="rectangle" draw:enhanced-path="M 0 0 L 21600 0 21600 21600 0 21600 0 0 Z N"/>
        </draw:custom-shape>
        <draw:custom-shape draw:style-name="gr4" draw:text-style-name="P4" xml:id="id16" draw:id="id16" draw:layer="layout" svg:width="1.5cm" svg:height="1cm" svg:x="21.5cm" svg:y="2.35cm">
          <text:p text:style-name="P3">n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" draw:id="id7" draw:layer="layout" svg:width="5.5cm" svg:height="0.999cm" svg:x="10cm" svg:y="7.601cm">
          <draw:glue-point draw:id="4" svg:x="-4.109cm" svg:y="5.005cm"/>
          <text:p text:style-name="P3">NetworkManager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5cm" svg:height="1.673cm" svg:x="12.25cm" svg:y="0.35cm">
          <draw:text-box>
            <text:p text:style-name="P6">Configuration</text:p>
          </draw:text-box>
        </draw:frame>
        <draw:frame draw:style-name="gr7" draw:text-style-name="P8" draw:layer="layout" svg:width="2.76cm" svg:height="0.962cm" svg:x="16.75cm" svg:y="0.35cm">
          <draw:text-box>
            <text:p>Filtering</text:p>
          </draw:text-box>
        </draw:frame>
        <draw:custom-shape draw:style-name="gr8" draw:text-style-name="P10" xml:id="id8" draw:id="id8" draw:layer="layout" svg:width="3.75cm" svg:height="1.5cm" svg:x="1cm" svg:y="8.85cm">
          <text:p text:style-name="P9">FRRouting daemons</text:p>
          <draw:enhanced-geometry svg:viewBox="0 0 21600 21600" draw:type="rectangle" draw:enhanced-path="M 0 0 L 21600 0 21600 21600 0 21600 0 0 Z N"/>
        </draw:custom-shape>
        <draw:custom-shape draw:style-name="gr9" draw:text-style-name="P11" xml:id="id6" draw:id="id6" draw:layer="layout" svg:width="12cm" svg:height="2.5cm" svg:x="10.75cm" svg:y="12.6cm">
          <draw:glue-point draw:id="4" svg:x="-3.333cm" svg:y="-5cm"/>
          <draw:glue-point draw:id="5" svg:x="-4.166cm" svg:y="-5cm"/>
          <draw:glue-point draw:id="6" svg:x="2.5cm" svg:y="-5cm" draw:escape-direction="up"/>
          <draw:glue-point draw:id="7" svg:x="-2.5cm" svg:y="-5cm"/>
          <draw:glue-point draw:id="8" svg:x="-0.833cm" svg:y="-5cm" draw:escape-direction="up"/>
          <draw:glue-point draw:id="9" svg:x="-1.666cm" svg:y="-5cm"/>
          <draw:glue-point draw:id="10" svg:x="4.166cm" svg:y="-5cm"/>
          <text:p text:style-name="P3">Netlin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0.25cm" svg:y1="13.35cm" svg:x2="34.75cm" svg:y2="13.35cm">
          <text:p/>
        </draw:line>
        <draw:custom-shape draw:style-name="gr11" draw:text-style-name="P5" xml:id="id1" draw:id="id1" draw:layer="layout" svg:width="3cm" svg:height="0.999cm" svg:x="17.5cm" svg:y="5.352cm">
          <text:p text:style-name="P3">firewalld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5.25cm" svg:height="2.5cm" svg:x="28.5cm" svg:y="2.35cm">
          <text:p text:style-name="P3">UFW</text:p>
          <text:p text:style-name="P3">(run by user and at boot)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19cm" svg:y1="6.351cm" svg:x2="19.75cm" svg:y2="7.849cm" draw:start-shape="id1" draw:start-glue-point="2" draw:end-shape="id2" draw:end-glue-point="3" svg:d="M19000 6351v1498h750" svg:viewBox="0 0 751 1499">
          <text:p/>
        </draw:connector>
        <draw:connector draw:style-name="gr14" draw:text-style-name="P12" draw:layer="layout" svg:x1="28.5cm" svg:y1="3.6cm" svg:x2="27.5cm" svg:y2="3.1cm" draw:start-shape="id3" draw:start-glue-point="3" draw:end-shape="id4" draw:end-glue-point="1" svg:d="M28500 3600h-500v-500h-500" svg:viewBox="0 0 1001 501">
          <text:p/>
        </draw:connector>
        <draw:connector draw:style-name="gr15" draw:text-style-name="P12" draw:layer="layout" draw:line-skew="2.025cm" svg:x1="9cm" svg:y1="5.55cm" svg:x2="13.75cm" svg:y2="12.6cm" draw:start-shape="id5" draw:start-glue-point="2" draw:end-shape="id6" draw:end-glue-point="7" svg:d="M9000 5550v5550h4750v1500" svg:viewBox="0 0 4751 7051">
          <text:p/>
        </draw:connector>
        <draw:connector draw:style-name="gr16" draw:text-style-name="P12" draw:layer="layout" draw:line-skew="-0.5cm" svg:x1="12.75cm" svg:y1="8.6cm" svg:x2="15.751cm" svg:y2="12.6cm" draw:start-shape="id7" draw:start-glue-point="2" draw:end-shape="id6" draw:end-glue-point="8" svg:d="M12750 8600v1500h3001v2500" svg:viewBox="0 0 3002 4001">
          <text:p/>
        </draw:connector>
        <draw:connector draw:style-name="gr17" draw:text-style-name="P12" draw:layer="layout" draw:line-skew="0.625cm" svg:x1="2.875cm" svg:y1="10.35cm" svg:x2="11.751cm" svg:y2="12.6cm" draw:start-shape="id8" draw:start-glue-point="2" draw:end-shape="id6" draw:end-glue-point="5" svg:d="M2875 10350v1750h8876v500" svg:viewBox="0 0 8877 2251">
          <text:p/>
        </draw:connector>
        <draw:custom-shape draw:style-name="gr18" draw:text-style-name="P4" xml:id="id9" draw:id="id9" draw:layer="layout" svg:width="3cm" svg:height="0.999cm" svg:x="13.5cm" svg:y="2.351cm">
          <text:p text:style-name="P3">GNOME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1" draw:id="id11" draw:layer="layout" svg:width="2.5cm" svg:height="1cm" svg:x="11.49cm" svg:y="6.1cm">
          <text:p text:style-name="P3">D-Bus</text:p>
          <draw:enhanced-geometry svg:viewBox="0 0 21600 21600" draw:type="rectangle" draw:enhanced-path="M 0 0 L 21600 0 21600 21600 0 21600 0 0 Z N"/>
        </draw:custom-shape>
        <draw:connector draw:style-name="gr20" draw:text-style-name="P12" draw:layer="layout" svg:x1="15cm" svg:y1="3.35cm" svg:x2="13.25cm" svg:y2="4.552cm" draw:start-shape="id9" draw:start-glue-point="2" draw:end-shape="id10" draw:end-glue-point="5" svg:d="M15000 3350v600h-1750v602" svg:viewBox="0 0 1751 1203">
          <text:p/>
        </draw:connector>
        <draw:connector draw:style-name="gr21" draw:text-style-name="P12" draw:layer="layout" svg:x1="12.74cm" svg:y1="7.1cm" svg:x2="12.75cm" svg:y2="7.601cm" draw:start-shape="id11" draw:start-glue-point="2" draw:end-shape="id7" draw:end-glue-point="0" svg:d="M12740 7100v250h10v251" svg:viewBox="0 0 11 502">
          <text:p/>
        </draw:connector>
        <draw:custom-shape draw:style-name="gr22" draw:text-style-name="P5" xml:id="id12" draw:id="id12" draw:layer="layout" svg:width="5.75cm" svg:height="0.999cm" svg:x="2.25cm" svg:y="7.35cm">
          <draw:glue-point draw:id="4" svg:x="-2.826cm" svg:y="-4.994cm"/>
          <text:p text:style-name="P3">systemd-networkd</text:p>
          <draw:enhanced-geometry svg:viewBox="0 0 21600 21600" draw:type="rectangle" draw:enhanced-path="M 0 0 L 21600 0 21600 21600 0 21600 0 0 Z N"/>
        </draw:custom-shape>
        <draw:connector draw:style-name="gr23" draw:text-style-name="P12" draw:layer="layout" draw:line-skew="1.126cm" svg:x1="5.125cm" svg:y1="8.349cm" svg:x2="12.751cm" svg:y2="12.6cm" draw:start-shape="id12" draw:start-glue-point="2" draw:end-shape="id6" draw:end-glue-point="4" svg:d="M5125 8349v3251h7626v1000" svg:viewBox="0 0 7627 4252">
          <text:p/>
        </draw:connector>
        <draw:custom-shape draw:style-name="gr24" draw:text-style-name="P4" xml:id="id13" draw:id="id13" draw:layer="layout" svg:width="2cm" svg:height="1cm" svg:x="11cm" svg:y="2.35cm">
          <text:p text:style-name="P3">nmcli</text:p>
          <draw:enhanced-geometry svg:viewBox="0 0 21600 21600" draw:type="rectangle" draw:enhanced-path="M 0 0 L 21600 0 21600 21600 0 21600 0 0 Z N"/>
        </draw:custom-shape>
        <draw:connector draw:style-name="gr25" draw:text-style-name="P12" draw:layer="layout" svg:x1="12cm" svg:y1="3.35cm" svg:x2="12cm" svg:y2="4.552cm" draw:start-shape="id13" draw:start-glue-point="2" draw:end-shape="id10" draw:end-glue-point="6" svg:d="M12000 3350v1202" svg:viewBox="0 0 1 1203">
          <text:p/>
        </draw:connector>
        <draw:custom-shape draw:style-name="gr26" draw:text-style-name="P4" xml:id="id14" draw:id="id14" draw:layer="layout" svg:width="4cm" svg:height="0.999cm" svg:x="17cm" svg:y="2.35cm">
          <text:p text:style-name="P3">firewall-cmd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svg:x1="19cm" svg:y1="3.349cm" svg:x2="19cm" svg:y2="3.849cm" draw:start-shape="id14" draw:start-glue-point="2" draw:end-shape="id15" draw:end-glue-point="0" svg:d="M19000 3349v500" svg:viewBox="0 0 1 501">
          <text:p/>
        </draw:connector>
        <draw:frame draw:style-name="gr28" draw:text-style-name="P14" draw:layer="layout" svg:width="19.034cm" svg:height="1.068cm" svg:x="4.9cm" svg:y="16.182cm">
          <draw:text-box>
            <text:p text:style-name="P13"><text:span text:style-name="T1">Continuously </text:span><text:span text:style-name="T1">running </text:span><text:span text:style-name="T1">daemon</text:span><text:span text:style-name="T2"> <text:s/></text:span><text:span text:style-name="T3">Non-daemon </text:span><text:span text:style-name="T3">process</text:span><text:span text:style-name="T2"> <text:s/></text:span><text:span text:style-name="T4">Library</text:span><text:span text:style-name="T2"> <text:s/></text:span><text:span text:style-name="T5">API</text:span></text:p>
          </draw:text-box>
        </draw:frame>
        <draw:custom-shape draw:style-name="gr19" draw:text-style-name="P11" xml:id="id15" draw:id="id15" draw:layer="layout" svg:width="2.5cm" svg:height="1cm" svg:x="17.75cm" svg:y="3.849cm">
          <text:p text:style-name="P3">D-Bus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svg:x1="19cm" svg:y1="4.849cm" svg:x2="19cm" svg:y2="5.352cm" draw:start-shape="id15" draw:start-glue-point="2" draw:end-shape="id1" draw:end-glue-point="0" svg:d="M19000 4849v503" svg:viewBox="0 0 1 504">
          <text:p/>
        </draw:connector>
        <draw:connector draw:style-name="gr30" draw:text-style-name="P12" draw:layer="layout" svg:x1="17.5cm" svg:y1="5.851cm" svg:x2="15.5cm" svg:y2="8.1cm" draw:start-shape="id1" draw:start-glue-point="3" draw:end-shape="id7" draw:end-glue-point="1" svg:d="M17500 5851h-1000v2249h-1000" svg:viewBox="0 0 2001 2250">
          <text:p/>
        </draw:connector>
        <draw:custom-shape draw:style-name="gr31" draw:text-style-name="P15" xml:id="id2" draw:id="id2" draw:layer="layout" svg:width="4cm" svg:height="0.999cm" svg:x="19.75cm" svg:y="7.35cm">
          <draw:glue-point draw:id="4" svg:x="1.25cm" svg:y="-4.994cm"/>
          <text:p text:style-name="P3">libnftables</text:p>
          <draw:enhanced-geometry svg:viewBox="0 0 21600 21600" draw:type="rectangle" draw:enhanced-path="M 0 0 L 21600 0 21600 21600 0 21600 0 0 Z N"/>
        </draw:custom-shape>
        <draw:connector draw:style-name="gr32" draw:text-style-name="P12" draw:layer="layout" svg:x1="22.25cm" svg:y1="3.35cm" svg:x2="22.25cm" svg:y2="7.351cm" draw:start-shape="id16" draw:start-glue-point="2" draw:end-shape="id2" draw:end-glue-point="4" svg:d="M22250 3350v4001" svg:viewBox="0 0 1 4002">
          <text:p/>
        </draw:connector>
        <draw:connector draw:style-name="gr33" draw:text-style-name="P12" draw:layer="layout" svg:x1="21.75cm" svg:y1="9.849cm" svg:x2="21.75cm" svg:y2="10.35cm" draw:start-shape="id17" draw:start-glue-point="2" draw:end-shape="id18" draw:end-glue-point="0" svg:d="M21750 9849v501" svg:viewBox="0 0 1 502">
          <text:p/>
        </draw:connector>
        <draw:custom-shape draw:style-name="gr34" draw:text-style-name="P15" xml:id="id17" draw:id="id17" draw:layer="layout" svg:width="2.5cm" svg:height="0.999cm" svg:x="20.5cm" svg:y="8.85cm">
          <text:p text:style-name="P3">libnftnl</text:p>
          <draw:enhanced-geometry svg:viewBox="0 0 21600 21600" draw:type="rectangle" draw:enhanced-path="M 0 0 L 21600 0 21600 21600 0 21600 0 0 Z N"/>
        </draw:custom-shape>
        <draw:connector draw:style-name="gr35" draw:text-style-name="P12" draw:layer="layout" svg:x1="21.75cm" svg:y1="8.349cm" svg:x2="21.75cm" svg:y2="8.85cm" draw:start-shape="id2" draw:start-glue-point="2" draw:end-shape="id17" draw:end-glue-point="0" svg:d="M21750 8349v501" svg:viewBox="0 0 1 502">
          <text:p/>
        </draw:connector>
        <draw:custom-shape draw:style-name="gr34" draw:text-style-name="P15" xml:id="id18" draw:id="id18" draw:layer="layout" svg:width="2.5cm" svg:height="0.999cm" svg:x="20.5cm" svg:y="10.35cm">
          <text:p text:style-name="P3">libmnl</text:p>
          <draw:enhanced-geometry svg:viewBox="0 0 21600 21600" draw:type="rectangle" draw:enhanced-path="M 0 0 L 21600 0 21600 21600 0 21600 0 0 Z N"/>
        </draw:custom-shape>
        <draw:connector draw:style-name="gr36" draw:text-style-name="P12" draw:layer="layout" svg:x1="21.75cm" svg:y1="11.349cm" svg:x2="21.749cm" svg:y2="12.6cm" draw:start-shape="id18" draw:start-glue-point="2" draw:end-shape="id6" draw:end-glue-point="10" svg:d="M21750 11349v625h-1v626" svg:viewBox="0 0 2 1252">
          <text:p/>
        </draw:connector>
        <draw:custom-shape draw:style-name="gr34" draw:text-style-name="P15" xml:id="id10" draw:id="id10" draw:layer="layout" svg:width="2.5cm" svg:height="0.999cm" svg:x="11.5cm" svg:y="4.551cm">
          <draw:glue-point draw:id="4" svg:x="-2cm" svg:y="-4.994cm"/>
          <draw:glue-point draw:id="5" svg:x="2cm" svg:y="-4.994cm"/>
          <draw:glue-point draw:id="6" svg:x="-3cm" svg:y="-4.994cm"/>
          <text:p text:style-name="P3">libnm</text:p>
          <draw:enhanced-geometry svg:viewBox="0 0 21600 21600" draw:type="rectangle" draw:enhanced-path="M 0 0 L 21600 0 21600 21600 0 21600 0 0 Z N"/>
        </draw:custom-shape>
        <draw:connector draw:style-name="gr37" draw:text-style-name="P12" draw:layer="layout" svg:x1="12.75cm" svg:y1="5.55cm" svg:x2="12.74cm" svg:y2="6.1cm" draw:start-shape="id10" draw:start-glue-point="2" draw:end-shape="id11" draw:end-glue-point="0" svg:d="M12750 5550v275h-10v275" svg:viewBox="0 0 11 551">
          <text:p/>
        </draw:connector>
        <draw:frame draw:style-name="gr38" draw:text-style-name="P8" draw:layer="layout" svg:width="1.808cm" svg:height="0.962cm" svg:x="26.75cm" svg:y="3.85cm">
          <draw:text-box>
            <text:p>shell</text:p>
          </draw:text-box>
        </draw:frame>
        <draw:line draw:style-name="gr10" draw:text-style-name="P3" draw:layer="layout" svg:x1="16.75cm" svg:y1="13.35cm" svg:x2="16.75cm" svg:y2="0.35cm">
          <text:p/>
        </draw:line>
        <draw:custom-shape draw:style-name="gr39" draw:text-style-name="P4" xml:id="id4" draw:id="id4" draw:layer="layout" svg:width="4cm" svg:height="1.5cm" svg:x="23.5cm" svg:y="2.35cm">
          <text:p text:style-name="P3">iptables-nft tools</text:p>
          <draw:enhanced-geometry svg:viewBox="0 0 21600 21600" draw:type="rectangle" draw:enhanced-path="M 0 0 L 21600 0 21600 21600 0 21600 0 0 Z N"/>
        </draw:custom-shape>
        <draw:connector draw:style-name="gr40" draw:text-style-name="P12" draw:layer="layout" svg:x1="25.5cm" svg:y1="3.85cm" svg:x2="23cm" svg:y2="9.349cm" draw:start-shape="id4" draw:start-glue-point="2" draw:end-shape="id17" draw:end-glue-point="1" svg:d="M25500 3850v5499h-2500" svg:viewBox="0 0 2501 5500">
          <text:p/>
        </draw:connector>
        <draw:custom-shape draw:style-name="gr41" draw:text-style-name="P15" xml:id="id5" draw:id="id5" draw:layer="layout" svg:width="3cm" svg:height="0.999cm" svg:x="7.5cm" svg:y="4.551cm">
          <draw:glue-point draw:id="4" svg:x="-2.5cm" svg:y="-4.994cm"/>
          <text:p text:style-name="P3">libnetlink</text:p>
          <draw:enhanced-geometry svg:viewBox="0 0 21600 21600" draw:type="rectangle" draw:enhanced-path="M 0 0 L 21600 0 21600 21600 0 21600 0 0 Z N"/>
        </draw:custom-shape>
        <draw:connector draw:style-name="gr42" draw:text-style-name="P12" draw:layer="layout" svg:x1="8.25cm" svg:y1="3.349cm" svg:x2="8.25cm" svg:y2="4.552cm" draw:start-shape="id19" draw:start-glue-point="2" draw:end-shape="id5" draw:end-glue-point="4" svg:d="M8250 3349v1203" svg:viewBox="0 0 1 1204">
          <text:p/>
        </draw:connector>
        <draw:custom-shape draw:style-name="gr43" draw:text-style-name="P5" xml:id="id20" draw:id="id20" draw:layer="layout" svg:width="2cm" svg:height="0.999cm" svg:x="9.49cm" svg:y="9.101cm">
          <text:p text:style-name="P3">udev</text:p>
          <draw:enhanced-geometry svg:viewBox="0 0 21600 21600" draw:type="rectangle" draw:enhanced-path="M 0 0 L 21600 0 21600 21600 0 21600 0 0 Z N"/>
        </draw:custom-shape>
        <draw:connector draw:style-name="gr44" draw:text-style-name="P12" draw:layer="layout" draw:line-skew="-0.75cm" svg:x1="10.49cm" svg:y1="10.1cm" svg:x2="14.751cm" svg:y2="12.6cm" draw:start-shape="id20" draw:start-glue-point="2" draw:end-shape="id6" draw:end-glue-point="9" svg:d="M10490 10100v500h4261v2000" svg:viewBox="0 0 4262 2501">
          <text:p/>
        </draw:connector>
        <draw:connector draw:style-name="gr45" draw:text-style-name="P12" draw:layer="layout" svg:x1="10.491cm" svg:y1="8.599cm" svg:x2="10.49cm" svg:y2="9.101cm" draw:start-shape="id7" draw:start-glue-point="4" draw:end-shape="id20" draw:end-glue-point="0" svg:d="M10491 8599v251h-1v251" svg:viewBox="0 0 2 503">
          <text:p/>
        </draw:connector>
        <draw:custom-shape draw:style-name="gr46" draw:text-style-name="P4" xml:id="id22" draw:id="id22" draw:layer="layout" svg:width="2.75cm" svg:height="0.999cm" svg:x="2.75cm" svg:y="2.351cm">
          <draw:glue-point draw:id="4" svg:x="2.272cm" svg:y="5.005cm"/>
          <draw:glue-point draw:id="5" svg:x="-2.272cm" svg:y="5.005cm"/>
          <text:p text:style-name="P3">netplan</text:p>
          <draw:enhanced-geometry svg:viewBox="0 0 21600 21600" draw:type="rectangle" draw:enhanced-path="M 0 0 L 21600 0 21600 21600 0 21600 0 0 Z N"/>
        </draw:custom-shape>
        <draw:connector draw:style-name="gr47" draw:text-style-name="P12" draw:layer="layout" draw:line-skew="1.12cm" svg:x1="4.749cm" svg:y1="6.349cm" svg:x2="10cm" svg:y2="8.1cm" draw:start-shape="id21" draw:start-glue-point="3" draw:end-shape="id7" draw:end-glue-point="3" svg:d="M4749 6349h3746v1751h1505" svg:viewBox="0 0 5252 1752">
          <text:p/>
        </draw:connector>
        <draw:connector draw:style-name="gr48" draw:text-style-name="P12" draw:layer="layout" svg:x1="3.501cm" svg:y1="3.349cm" svg:x2="3.501cm" svg:y2="7.351cm" draw:start-shape="id22" draw:start-glue-point="5" draw:end-shape="id12" draw:end-glue-point="4" svg:d="M3501 3349v4002" svg:viewBox="0 0 1 4003">
          <text:p/>
        </draw:connector>
        <draw:connector draw:style-name="gr49" draw:text-style-name="P3" xml:id="id21" draw:id="id21" draw:layer="layout" svg:x1="4.749cm" svg:y1="3.349cm" svg:x2="4.749cm" svg:y2="6.349cm" draw:start-shape="id22" draw:start-glue-point="4" svg:d="M4749 3349v3000" svg:viewBox="0 0 1 3001">
          <text:p/>
        </draw:connector>
        <draw:frame draw:style-name="gr50" draw:text-style-name="P8" draw:layer="layout" svg:width="2.514cm" svg:height="0.962cm" svg:x="4.736cm" svg:y="3.388cm">
          <draw:text-box>
            <text:p>configs</text:p>
          </draw:text-box>
        </draw:frame>
        <draw:frame draw:style-name="gr50" draw:text-style-name="P8" draw:layer="layout" svg:width="2.514cm" svg:height="0.962cm" svg:x="1cm" svg:y="3.35cm">
          <draw:text-box>
            <text:p>configs</text:p>
          </draw:text-box>
        </draw:frame>
        <draw:connector draw:style-name="gr37" draw:text-style-name="P12" draw:layer="layout" svg:x1="24.188cm" svg:y1="16.731cm" svg:x2="24.688cm" svg:y2="16.732cm" svg:d="M24188 16731h250v1h250" svg:viewBox="0 0 501 2">
          <text:p/>
        </draw:connector>
        <draw:frame draw:style-name="gr50" draw:text-style-name="P8" draw:layer="layout" svg:width="3.962cm" svg:height="0.962cm" svg:x="24.688cm" svg:y="16.27cm">
          <draw:text-box>
            <text:p>dependency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d42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4T13:19:27.255301636</meta:creation-date>
    <dc:date>2026-06-30T10:06:04.556346570</dc:date>
    <meta:editing-duration>P1DT8H45M55S</meta:editing-duration>
    <meta:editing-cycles>64</meta:editing-cycles>
    <meta:generator>LibreOffice/25.2.3.2$Linux_X86_64 LibreOffice_project/520$Build-2</meta:generator>
    <meta:document-statistic meta:object-count="57"/>
  </office:meta>
</office:document-meta>
</file>